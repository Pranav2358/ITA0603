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Table1" style:family="table">
      <style:table-properties style:width="1.766in" fo:margin-left="1.7604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1.A2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2" style:family="table">
      <style:table-properties style:width="3.6854in" fo:margin-left="1.7604in" table:align="left"/>
    </style:style>
    <style:style style:name="Table2.A" style:family="table-column">
      <style:table-column-properties style:column-width="0.7132in"/>
    </style:style>
    <style:style style:name="Table2.B" style:family="table-column">
      <style:table-column-properties style:column-width="0.6653in"/>
    </style:style>
    <style:style style:name="Table2.C" style:family="table-column">
      <style:table-column-properties style:column-width="0.9993in"/>
    </style:style>
    <style:style style:name="Table2.D" style:family="table-column">
      <style:table-column-properties style:column-width="0.7583in"/>
    </style:style>
    <style:style style:name="Table2.E" style:family="table-column">
      <style:table-column-properties style:column-width="0.5493in"/>
    </style:style>
    <style:style style:name="Table2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2.A5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3" style:family="table">
      <style:table-properties style:width="4.6431in" fo:margin-left="1.7604in" table:align="left"/>
    </style:style>
    <style:style style:name="Table3.A" style:family="table-column">
      <style:table-column-properties style:column-width="0.7132in"/>
    </style:style>
    <style:style style:name="Table3.B" style:family="table-column">
      <style:table-column-properties style:column-width="0.684in"/>
    </style:style>
    <style:style style:name="Table3.C" style:family="table-column">
      <style:table-column-properties style:column-width="0.9993in"/>
    </style:style>
    <style:style style:name="Table3.D" style:family="table-column">
      <style:table-column-properties style:column-width="0.7583in"/>
    </style:style>
    <style:style style:name="Table3.E" style:family="table-column">
      <style:table-column-properties style:column-width="0.5181in"/>
    </style:style>
    <style:style style:name="Table3.F" style:family="table-column">
      <style:table-column-properties style:column-width="0.9701in"/>
    </style:style>
    <style:style style:name="Table3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3.A6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4" style:family="table">
      <style:table-properties style:width="3.6229in" fo:margin-left="1.7604in" table:align="left"/>
    </style:style>
    <style:style style:name="Table4.A" style:family="table-column">
      <style:table-column-properties style:column-width="0.7132in"/>
    </style:style>
    <style:style style:name="Table4.B" style:family="table-column">
      <style:table-column-properties style:column-width="0.5549in"/>
    </style:style>
    <style:style style:name="Table4.C" style:family="table-column">
      <style:table-column-properties style:column-width="0.6382in"/>
    </style:style>
    <style:style style:name="Table4.D" style:family="table-column">
      <style:table-column-properties style:column-width="0.6292in"/>
    </style:style>
    <style:style style:name="Table4.E" style:family="table-column">
      <style:table-column-properties style:column-width="1.0875in"/>
    </style:style>
    <style:style style:name="Table4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4.A3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5" style:family="table">
      <style:table-properties style:width="4.3146in" fo:margin-left="1.7604in" table:align="left"/>
    </style:style>
    <style:style style:name="Table5.A" style:family="table-column">
      <style:table-column-properties style:column-width="0.7132in"/>
    </style:style>
    <style:style style:name="Table5.B" style:family="table-column">
      <style:table-column-properties style:column-width="0.684in"/>
    </style:style>
    <style:style style:name="Table5.C" style:family="table-column">
      <style:table-column-properties style:column-width="0.9993in"/>
    </style:style>
    <style:style style:name="Table5.D" style:family="table-column">
      <style:table-column-properties style:column-width="0.6569in"/>
    </style:style>
    <style:style style:name="Table5.E" style:family="table-column">
      <style:table-column-properties style:column-width="0.5174in"/>
    </style:style>
    <style:style style:name="Table5.F" style:family="table-column">
      <style:table-column-properties style:column-width="0.7438in"/>
    </style:style>
    <style:style style:name="Table5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5.A5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6" style:family="table">
      <style:table-properties style:width="5.1646in" fo:margin-left="1.7604in" table:align="left"/>
    </style:style>
    <style:style style:name="Table6.A" style:family="table-column">
      <style:table-column-properties style:column-width="0.7132in"/>
    </style:style>
    <style:style style:name="Table6.B" style:family="table-column">
      <style:table-column-properties style:column-width="0.9903in"/>
    </style:style>
    <style:style style:name="Table6.C" style:family="table-column">
      <style:table-column-properties style:column-width="0.6382in"/>
    </style:style>
    <style:style style:name="Table6.D" style:family="table-column">
      <style:table-column-properties style:column-width="0.8722in"/>
    </style:style>
    <style:style style:name="Table6.E" style:family="table-column">
      <style:table-column-properties style:column-width="0.8729in"/>
    </style:style>
    <style:style style:name="Table6.F" style:family="table-column">
      <style:table-column-properties style:column-width="1.0778in"/>
    </style:style>
    <style:style style:name="Table6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6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6.A5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7" style:family="table">
      <style:table-properties style:width="5.1646in" fo:margin-left="1.7604in" table:align="left"/>
    </style:style>
    <style:style style:name="Table7.A" style:family="table-column">
      <style:table-column-properties style:column-width="2.4583in"/>
    </style:style>
    <style:style style:name="Table7.B" style:family="table-column">
      <style:table-column-properties style:column-width="2.7063in"/>
    </style:style>
    <style:style style:name="Table7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7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7.A5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8" style:family="table">
      <style:table-properties style:width="5.1646in" fo:margin-left="1.7604in" table:align="left"/>
    </style:style>
    <style:style style:name="Table8.A" style:family="table-column">
      <style:table-column-properties style:column-width="2.5215in"/>
    </style:style>
    <style:style style:name="Table8.B" style:family="table-column">
      <style:table-column-properties style:column-width="2.6431in"/>
    </style:style>
    <style:style style:name="Table8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8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8.A6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Table9" style:family="table">
      <style:table-properties style:width="4.3042in" fo:margin-left="1.7604in" table:align="left"/>
    </style:style>
    <style:style style:name="Table9.A" style:family="table-column">
      <style:table-column-properties style:column-width="2.0035in"/>
    </style:style>
    <style:style style:name="Table9.B" style:family="table-column">
      <style:table-column-properties style:column-width="2.3007in"/>
    </style:style>
    <style:style style:name="Table9.A1" style:family="table-cell">
      <style:table-cell-properties style:vertical-align="middle" fo:padding-left="0in" fo:padding-right="0in" fo:padding-top="0in" fo:padding-bottom="0.0833in" fo:border-left="none" fo:border-right="none" fo:border-top="none" fo:border-bottom="0.75pt solid #000000"/>
    </style:style>
    <style:style style:name="Table9.A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Table9.A6" style:family="table-cell">
      <style:table-cell-properties style:vertical-align="middle" fo:padding-left="0.0194in" fo:padding-right="0.0194in" fo:padding-top="0.0194in" fo:padding-bottom="0.1042in" fo:border="0.05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7pt" fo:font-style="normal" style:text-underline-style="none" fo:font-weight="bold" officeooo:paragraph-rsid="001dc639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paragraph-rsid="001dc639" style:text-blinking="false" fo:background-color="transparent"/>
    </style:style>
    <style:style style:name="P3" style:family="paragraph" style:parent-style-name="Text_20_body">
      <style:text-properties officeooo:paragraph-rsid="001dc639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c639"/>
    </style:style>
    <style:style style:name="P5" style:family="paragraph" style:parent-style-name="Text_20_body">
      <style:text-properties fo:font-weight="normal" officeooo:paragraph-rsid="001dc639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dc639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weight="normal" officeooo:paragraph-rsid="001dc639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normal" officeooo:paragraph-rsid="001dc639" style:text-blinking="false" fo:background-color="transparent"/>
    </style:style>
    <style:style style:name="P9" style:family="paragraph" style:parent-style-name="Text_20_body">
      <style:paragraph-properties fo:margin-left="2in" fo:margin-right="0in" fo:margin-top="0in" fo:margin-bottom="0in" style:contextual-spacing="false" fo:line-height="120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dc639" style:text-blinking="false" fo:background-color="transparent"/>
    </style:style>
    <style:style style:name="P10" style:family="paragraph" style:parent-style-name="Text_20_body">
      <style:paragraph-properties fo:margin-left="1.5in" fo:margin-right="0in" fo:margin-top="0in" fo:margin-bottom="0in" style:contextual-spacing="false" fo:line-height="120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dc639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officeooo:paragraph-rsid="001dc639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normal" officeooo:paragraph-rsid="001dc639" style:text-blinking="false" fo:background-color="transparent"/>
    </style:style>
    <style:style style:name="P13" style:family="paragraph" style:parent-style-name="Text_20_body">
      <style:paragraph-properties fo:margin-left="2.5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dc639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dc639" style:text-blinking="false" fo:background-color="transparent"/>
    </style:style>
    <style:style style:name="P15" style:family="paragraph" style:parent-style-name="Heading_20_1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dc639" style:text-blinking="false" fo:background-color="transparent" style:font-size-asian="12pt" style:font-size-complex="12pt"/>
    </style:style>
    <style:style style:name="P16" style:family="paragraph" style:parent-style-name="Heading_20_3">
      <style:paragraph-properties fo:margin-left="0in" fo:margin-right="0in" fo:margin-top="0.1665in" fo:margin-bottom="0.0417in" style:contextual-spacing="false" fo:line-height="155%" fo:text-align="justify" style:justify-single-word="false" fo:text-indent="0in" style:auto-text-indent="false" fo:padding="0.0193in" fo:border="0.06pt solid #000000"/>
      <style:text-properties fo:color="#000000" loext:opacity="100%" style:font-name="Times New Roman" fo:font-size="12pt" fo:font-weight="bold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color="#000000" loext:opacity="100%" style:font-name="Arial" fo:font-weight="bold"/>
    </style:style>
    <style:style style:name="P18" style:family="paragraph" style:parent-style-name="Preformatted_20_Text">
      <loext:graphic-properties draw:fill="none" draw:fill-color="#000000"/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 fo:background-color="transparent" fo:padding-left="0.2083in" fo:padding-right="0in" fo:padding-top="0.0193in" fo:padding-bottom="0.1252in" fo:border-left="0.06pt solid #000000" fo:border-right="none" fo:border-top="0.06pt solid #000000" fo:border-bottom="0.06pt solid #000000"/>
      <style:text-properties fo:color="#000000" loext:opacity="100%" style:font-name="Arial" fo:font-size="12pt" fo:font-weight="bold"/>
    </style:style>
    <style:style style:name="P19" style:family="paragraph" style:parent-style-name="Preformatted_20_Text">
      <loext:graphic-properties draw:fill="none" draw:fill-color="#000000"/>
      <style:paragraph-properties fo:margin-left="0in" fo:margin-right="0in" fo:margin-top="0in" fo:margin-bottom="0in" style:contextual-spacing="false" style:line-height-at-least="0.2083in" fo:text-align="justify" style:justify-single-word="false" fo:background-color="transparent" fo:padding-left="0.2083in" fo:padding-right="0in" fo:padding-top="0.0193in" fo:padding-bottom="0.1252in" fo:border-left="0.06pt solid #000000" fo:border-right="none" fo:border-top="0.06pt solid #000000" fo:border-bottom="0.06pt solid #000000"/>
      <style:text-properties fo:color="#000000" loext:opacity="100%" style:font-name="Arial" fo:font-size="12pt" fo:font-weight="bold"/>
    </style:style>
    <style:style style:name="P20" style:family="paragraph" style:parent-style-name="Text_20_body" style:list-style-name="L1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4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5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6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7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27" style:family="paragraph" style:parent-style-name="Horizontal_20_Line">
      <style:paragraph-properties fo:margin-top="0in" fo:margin-bottom="0in" style:contextual-spacing="false" fo:line-height="120%" fo:text-align="justify" style:justify-single-word="false"/>
      <style:text-properties fo:color="#000000" loext:opacity="100%" style:font-name="Times New Roman" fo:font-size="12pt" fo:font-weight="bold" style:font-size-asian="12pt" style:font-size-complex="12pt"/>
    </style:style>
    <style:style style:name="P28" style:family="paragraph" style:parent-style-name="Heading_20_3">
      <style:paragraph-properties fo:margin-left="0in" fo:margin-right="0in" fo:margin-top="0in" fo:margin-bottom="0.0417in" style:contextual-spacing="false" fo:line-height="155%" fo:text-align="justify" style:justify-single-word="false" fo:text-indent="0in" style:auto-text-indent="false" fo:padding="0.0193in" fo:border="0.06pt solid #000000"/>
      <style:text-properties fo:color="#000000" loext:opacity="100%" style:font-name="Times New Roman" fo:font-size="12pt" fo:font-weight="bold" style:font-size-asian="12pt" style:font-size-complex="12pt"/>
    </style:style>
    <style:style style:name="P29" style:family="paragraph" style:parent-style-name="Text_20_body" style:list-style-name="L8">
      <style:paragraph-properties fo:margin-left="0in" fo:margin-right="0in" fo:margin-top="0in" fo:margin-bottom="0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color="#000000" loext:opacity="100%" style:font-name="Arial" fo:font-weight="bold"/>
    </style:style>
    <style:style style:name="P30" style:family="paragraph" style:parent-style-name="Text_20_body" style:list-style-name="L8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  <style:text-properties fo:color="#0d0d0d" loext:opacity="100%" style:font-name="Times New Roman" fo:font-size="12pt" fo:font-weight="bold" style:font-size-asian="12pt" style:font-size-complex="12pt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Table_20_Contents">
      <style:paragraph-properties fo:margin-left="0in" fo:margin-right="0in" fo:margin-top="0in" fo:margin-bottom="0in" style:contextual-spacing="false"/>
      <style:text-properties style:font-name="Times New Roman" fo:font-size="12pt" style:font-size-asian="12pt" style:font-size-complex="12pt"/>
    </style:style>
    <style:style style:name="P35" style:family="paragraph" style:parent-style-name="Text_20_body" style:list-style-name="L9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10">
      <style:paragraph-properties fo:margin-left="0in" fo:margin-right="0in" fo:margin-top="0in" fo:margin-bottom="0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color="#000000" loext:opacity="100%" style:font-name="Arial" fo:font-weight="bold"/>
    </style:style>
    <style:style style:name="P37" style:family="paragraph" style:parent-style-name="Text_20_body" style:list-style-name="L10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list-style-name="L11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2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Heading_20_1">
      <style:paragraph-properties fo:margin-left="0in" fo:margin-right="0in" fo:margin-top="0in" fo:margin-bottom="0.0835in" style:contextual-spacing="false" fo:line-height="133%" fo:text-align="justify" style:justify-single-word="false" fo:text-indent="0in" style:auto-text-indent="false" fo:padding="0.0193in" fo:border="0.06pt solid #000000"/>
      <style:text-properties fo:color="#000000" loext:opacity="100%" style:font-name="Times New Roman" fo:font-size="12pt" fo:font-weight="bold" style:font-size-asian="12pt" style:font-size-complex="12pt"/>
    </style:style>
    <style:style style:name="P41" style:family="paragraph" style:parent-style-name="Text_20_body" style:list-style-name="L13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14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15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16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17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18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 style:list-style-name="L19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20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in" fo:margin-right="0in" fo:margin-top="0in" fo:margin-bottom="0.1665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Preformatted_20_Text">
      <loext:graphic-properties draw:fill="none" draw:fill-color="#000000"/>
      <style:paragraph-properties fo:margin-left="0in" fo:margin-right="0in" fo:margin-top="0in" fo:margin-bottom="0in" style:contextual-spacing="false" style:line-height-at-least="0.2083in" fo:text-align="justify" style:justify-single-word="false" fo:background-color="transparent" fo:padding-left="0.2083in" fo:padding-right="0in" fo:padding-top="0.0193in" fo:padding-bottom="0.1252in" fo:border-left="0.06pt solid #000000" fo:border-right="none" fo:border-top="0.06pt solid #000000" fo:border-bottom="0.06pt solid #000000"/>
      <style:text-properties fo:color="#000000" loext:opacity="100%" style:font-name="Times New Roman" fo:font-size="12pt" fo:font-weight="bold" style:font-size-asian="12pt" style:font-size-complex="12pt"/>
    </style:style>
    <style:style style:name="P51" style:family="paragraph" style:parent-style-name="Text_20_body" style:list-style-name="L21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22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23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24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25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26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27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28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29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30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31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32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33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4" style:family="paragraph" style:parent-style-name="Heading_20_2">
      <style:paragraph-properties fo:margin-left="0in" fo:margin-right="0in" fo:margin-top="0.1665in" fo:margin-bottom="0.0417in" style:contextual-spacing="false" fo:line-height="140%" fo:text-align="justify" style:justify-single-word="false" fo:text-indent="0in" style:auto-text-indent="false" fo:padding="0.0193in" fo:border="0.06pt solid #000000"/>
      <style:text-properties fo:color="#000000" loext:opacity="100%" style:font-name="Times New Roman" fo:font-size="12pt" fo:font-weight="bold" style:font-size-asian="12pt" style:font-size-complex="12pt"/>
    </style:style>
    <style:style style:name="P65" style:family="paragraph" style:parent-style-name="Text_20_body" style:list-style-name="L34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6" style:family="paragraph" style:parent-style-name="Text_20_body" style:list-style-name="L35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7" style:family="paragraph" style:parent-style-name="Text_20_body" style:list-style-name="L36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8" style:family="paragraph" style:parent-style-name="Text_20_body" style:list-style-name="L37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38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0" style:family="paragraph" style:parent-style-name="Text_20_body" style:list-style-name="L39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1" style:family="paragraph" style:parent-style-name="Heading_20_2">
      <style:paragraph-properties fo:margin-left="0in" fo:margin-right="0in" fo:margin-top="0in" fo:margin-bottom="0.0417in" style:contextual-spacing="false" fo:line-height="140%" fo:text-align="justify" style:justify-single-word="false" fo:text-indent="0in" style:auto-text-indent="false" fo:padding="0.0193in" fo:border="0.06pt solid #000000"/>
      <style:text-properties fo:color="#000000" loext:opacity="100%" style:font-name="Times New Roman" fo:font-size="12pt" fo:font-weight="bold" style:font-size-asian="12pt" style:font-size-complex="12pt"/>
    </style:style>
    <style:style style:name="P72" style:family="paragraph" style:parent-style-name="Text_20_body" style:list-style-name="L40">
      <style:paragraph-properties fo:margin-left="0in" fo:margin-right="0in" fo:margin-top="0in" fo:margin-bottom="0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color="#000000" loext:opacity="100%" style:font-name="Arial" fo:font-weight="bold"/>
    </style:style>
    <style:style style:name="P73" style:family="paragraph" style:parent-style-name="Text_20_body" style:list-style-name="L41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4" style:family="paragraph" style:parent-style-name="Text_20_body" style:list-style-name="L42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5" style:family="paragraph" style:parent-style-name="Preformatted_20_Text">
      <loext:graphic-properties draw:fill="none" draw:fill-color="#000000"/>
      <style:paragraph-properties fo:margin-left="0in" fo:margin-right="0in" fo:margin-top="0in" fo:margin-bottom="0in" style:contextual-spacing="false" style:line-height-at-least="0.2083in" fo:text-align="justify" style:justify-single-word="false" fo:background-color="transparent" fo:padding-left="0.2083in" fo:padding-right="0in" fo:padding-top="0.0193in" fo:padding-bottom="0.1252in" fo:border-left="0.06pt solid #000000" fo:border-right="none" fo:border-top="0.06pt solid #000000" fo:border-bottom="0.06pt solid #000000"/>
      <style:text-properties fo:color="#ff8000" loext:opacity="100%" style:font-name="Times New Roman" fo:font-size="12pt" fo:font-weight="bold" style:font-size-asian="12pt" style:font-size-complex="12pt"/>
    </style:style>
    <style:style style:name="P76" style:family="paragraph" style:parent-style-name="Text_20_body" style:list-style-name="L43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7" style:family="paragraph" style:parent-style-name="Text_20_body" style:list-style-name="L44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8" style:family="paragraph" style:parent-style-name="Text_20_body" style:list-style-name="L45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 loext:padding="0.0193in" loext:border="0.06pt solid #000000"/>
    </style:style>
    <style:style style:name="P80" style:family="paragraph" style:parent-style-name="Text_20_body">
      <style:paragraph-properties fo:margin-left="0in" fo:margin-right="0in" fo:text-indent="0in" style:auto-text-indent="false"/>
    </style:style>
    <style:style style:name="P81" style:family="paragraph" style:parent-style-name="Text_20_body" style:list-style-name="L46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47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3" style:family="paragraph" style:parent-style-name="Text_20_body" style:list-style-name="L48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49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50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51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52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53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89" style:family="paragraph" style:parent-style-name="Text_20_body" style:list-style-name="L54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55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56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92" style:family="paragraph" style:parent-style-name="Text_20_body" style:list-style-name="L57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58">
      <style:paragraph-properties fo:margin-left="0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94" style:family="paragraph" style:parent-style-name="Text_20_body" style:list-style-name="L58">
      <style:paragraph-properties fo:margin-left="0in" fo:margin-right="0in" fo:margin-top="0in" fo:margin-bottom="0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color="#000000" loext:opacity="100%" style:font-name="Arial" fo:font-weight="bold"/>
    </style:style>
    <style:style style:name="P95" style:family="paragraph" style:parent-style-name="Text_20_body">
      <style:paragraph-properties fo:margin-left="0.0417in" fo:margin-right="0in" fo:margin-top="0in" fo:margin-bottom="0.0417in" style:contextual-spacing="false" fo:line-height="120%" fo:text-align="justify" style:justify-single-word="false" fo:orphans="2" fo:widows="2" fo:text-indent="0in" style:auto-text-indent="false" fo:padding="0.0193in" fo:border="0.06pt solid #000000"/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dc639" style:text-blinking="false" fo:background-color="transparent" style:font-size-asian="12pt" style:font-size-complex="12pt"/>
    </style:style>
    <style:style style:name="T1" style:family="text">
      <style:text-properties officeooo:rsid="001dc639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a19a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style:text-blinking="false" fo:background-color="transparent" loext:char-shading-value="0"/>
    </style:style>
    <style:style style:name="T8" style:family="text">
      <style:text-properties style:text-underline-style="solid" style:text-underline-width="auto" style:text-underline-color="font-color" officeooo:rsid="001a19a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a19aa"/>
    </style:style>
    <style:style style:name="T11" style:family="text">
      <style:text-properties fo:font-variant="normal" fo:text-transform="none" fo:color="#0d0d0d" loext:opacity="100%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d0d0d" loext:opacity="100%" style:font-name="Times New Roman" fo:font-size="12pt" fo:letter-spacing="normal" fo:font-style="normal" fo:font-weight="bold" style:font-size-asian="12pt" style:font-size-complex="12pt" loext:padding="0.0193in" loext:border="0.06pt solid #000000"/>
    </style:style>
    <style:style style:name="T13" style:family="text">
      <style:text-properties fo:color="#0d0d0d" loext:opacity="100%" style:font-name="Times New Roman" fo:font-weight="normal" fo:background-color="transparent" loext:char-shading-value="0" style:font-size-asian="12pt" style:font-size-complex="12pt" loext:padding="0.0193in" loext:border="0.06pt solid #000000"/>
    </style:style>
    <style:style style:name="T14" style:family="text">
      <style:text-properties fo:color="#ff8000" loext:opacity="100%" style:font-name="Times New Roman" fo:font-weight="normal" fo:background-color="transparent" loext:char-shading-value="0" style:font-size-asian="12pt" style:font-size-complex="12pt" loext:padding="0.0193in" loext:border="0.06pt solid #000000"/>
    </style:style>
    <style:style style:name="T15" style:family="text">
      <style:text-properties fo:font-variant="normal" fo:text-transform="none" fo:color="#ff8000" loext:opacity="100%" style:font-name="Times New Roman" fo:letter-spacing="normal" fo:background-color="transparent" loext:char-shading-value="0" style:font-size-asian="12pt" style:font-size-complex="12pt" loext:padding="0.0193in" loext:border="0.06pt solid #000000"/>
    </style:style>
    <style:style style:name="T16" style:family="text">
      <style:text-properties fo:font-variant="normal" fo:text-transform="none" fo:color="#ff8000" loext:opacity="100%" style:font-name="Times New Roman" fo:letter-spacing="normal" fo:font-style="normal" fo:background-color="transparent" loext:char-shading-value="0" style:font-size-asian="12pt" style:font-weight-asian="bold" style:font-size-complex="12pt" style:font-weight-complex="bold" loext:padding="0.0193in" loext:border="0.06pt solid #000000"/>
    </style:style>
    <style:style style:name="T17" style:family="text">
      <style:text-properties fo:font-variant="normal" fo:text-transform="none" fo:color="#ff8000" loext:opacity="100%" style:font-name="Times New Roman" fo:letter-spacing="normal" fo:font-style="normal" fo:font-weight="normal" fo:background-color="transparent" loext:char-shading-value="0" style:font-size-asian="12pt" style:font-size-complex="12pt" loext:padding="0.0193in" loext:border="0.06pt solid #000000"/>
    </style:style>
    <style:style style:name="T18" style:family="text">
      <style:text-properties fo:font-variant="normal" fo:text-transform="none" fo:color="#0d0d0d" loext:opacity="100%" style:font-name="Times New Roman" fo:letter-spacing="normal" fo:font-style="normal" fo:font-weight="normal" fo:background-color="transparent" loext:char-shading-value="0" style:font-size-asian="12pt" style:font-size-complex="12pt" loext:padding="0.0193in" loext:border="0.06pt solid #000000"/>
    </style:style>
    <style:style style:name="T19" style:family="text">
      <style:text-properties fo:font-style="italic"/>
    </style:style>
    <style:style style:name="T20" style:family="text">
      <style:text-properties fo:font-variant="normal" fo:text-transform="none" fo:color="#0d0d0d" loext:opacity="100%" style:font-name="Times New Roman" fo:letter-spacing="normal" fo:background-color="transparent" loext:char-shading-value="0" style:font-size-asian="12pt" style:font-size-complex="12pt" loext:padding="0.0193in" loext:border="0.06pt solid #00000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c0a5c54-7fff-e7b4-9a3c-19160ea01c22"/>SIMATS ENGINEERING</text:p>
      <text:p text:style-name="P2">ASSESSMENT TOOL <text:span text:style-name="T1">2</text:span></text:p>
      <text:p text:style-name="P3"/>
      <text:p text:style-name="P4"><text:span text:style-name="T2">COURSE CODE:</text:span><text:span text:style-name="T3"> </text:span><text:span text:style-name="T2">ITA 06</text:span><text:span text:style-name="T4">03</text:span><text:span text:style-name="T3">         </text:span><text:span text:style-name="T2">COURSE NAME: MACHINE LEARNING  </text:span></text:p>
      <text:p text:style-name="P5"><text:line-break/><text:line-break/></text:p>
      <text:p text:style-name="P6">COURSE OUTCOME COVERED</text:p>
      <text:p text:style-name="P3"/>
      <text:p text:style-name="P7"><text:span text:style-name="T5">CO1: </text:span><text:span text:style-name="T6">Learning Problems, Perspectives and Issues, Concept Learning, Version Spaces &amp; Candidate Elimination, Inductive Bias, Decision Tree Learning, Representation &amp; Heuristic Search  (</text:span><text:span text:style-name="T7">BL1, BL2)</text:span></text:p>
      <text:p text:style-name="P3"/>
      <text:p text:style-name="P8">Assessment Tool Weightage: 40%</text:p>
      <text:p text:style-name="P5"><text:line-break/></text:p>
      <text:p text:style-name="P4"><text:span text:style-name="T2">QUESTIONS: 15</text:span><text:span text:style-name="T3"> </text:span><text:span text:style-name="T2">Total Marks: 25</text:span></text:p>
      <text:p text:style-name="P3"/>
      <text:p text:style-name="P9">Annexure A</text:p>
      <text:p text:style-name="P10">APPLICATION BASED QUESTIONS </text:p>
      <text:p text:style-name="P5"><text:line-break/><text:line-break/><text:line-break/><text:line-break/><text:line-break/></text:p>
      <text:p text:style-name="P11">Code of Conduct:</text:p>
      <text:p text:style-name="P3"/>
      <text:p text:style-name="P12">I _<text:span text:style-name="T8">M.v.Pranav (192312358)</text:span><text:span text:style-name="T9"> </text:span>certify that this submission is my original work and that I have adhered to the guidelines specified for this assessment.</text:p>
      <text:p text:style-name="P12">I understand that any violation of academic integrity rules will result in disciplinary action.</text:p>
      <text:p text:style-name="P3"/>
      <text:p text:style-name="P11">Signature of the student:</text:p>
      <text:p text:style-name="P5"><text:span text:style-name="T10">pranav mv</text:span><text:line-break/><text:line-break/><text:line-break/><text:line-break/><text:soft-page-break/><text:line-break/><text:line-break/><text:line-break/><text:line-break/><text:line-break/></text:p>
      <text:p text:style-name="P13">Annexure A</text:p>
      <text:p text:style-name="P3"/>
      <text:p text:style-name="P14">Short Answer Test</text:p>
      <text:h text:style-name="P15" text:outline-level="1">Q1. Explain all the possible blocks in a Machine Learning System. Give examples of Supervised and Unsupervised Learning.</text:h>
      <text:h text:style-name="P16" text:outline-level="3">Answer</text:h>
      <text:p text:style-name="P17"><text:span text:style-name="T11">A </text:span><text:span text:style-name="Strong_20_Emphasis"><text:span text:style-name="T12">Machine Learning (ML) system</text:span></text:span><text:span text:style-name="T11"> learns patterns from data and makes predictions or decisions without being explicitly programmed.</text:span></text:p>
      <text:h text:style-name="P16" text:outline-level="3">Block Diagram</text:h>
      <text:section text:style-name="Sect1" text:name="code-block-viewer">
        <text:p text:style-name="P18"><text:span text:style-name="Source_20_Text"><text:span text:style-name="T13">D</text:span></text:span><text:span text:style-name="Source_20_Text"><text:span text:style-name="T14">ata Collection</text:span></text:span></text:p>
        <text:p text:style-name="P19"><text:span text:style-name="Source_20_Text"><text:span text:style-name="T15"><text:s text:c="7"/>↓</text:span></text:span></text:p>
        <text:p text:style-name="P19"><text:span text:style-name="Source_20_Text"><text:span text:style-name="T16">Data</text:span></text:span><text:span text:style-name="Source_20_Text"><text:span text:style-name="T17"> Preprocessing</text:span></text:span></text:p>
        <text:p text:style-name="P19"><text:span text:style-name="Source_20_Text"><text:span text:style-name="T15"><text:s text:c="7"/>↓</text:span></text:span></text:p>
        <text:p text:style-name="P19"><text:span text:style-name="Source_20_Text"><text:span text:style-name="T17">Feature Selection / Feature Engineering</text:span></text:span></text:p>
        <text:p text:style-name="P19"><text:span text:style-name="Source_20_Text"><text:span text:style-name="T15"><text:s text:c="7"/>↓</text:span></text:span></text:p>
        <text:p text:style-name="P19"><text:span text:style-name="Source_20_Text"><text:span text:style-name="T17">Model Selection</text:span></text:span></text:p>
        <text:p text:style-name="P19"><text:span text:style-name="Source_20_Text"><text:span text:style-name="T15"><text:s text:c="7"/>↓</text:span></text:span></text:p>
        <text:p text:style-name="P19"><text:span text:style-name="Source_20_Text"><text:span text:style-name="T17">Model Training</text:span></text:span></text:p>
        <text:p text:style-name="P19"><text:span text:style-name="Source_20_Text"><text:span text:style-name="T15"><text:s text:c="7"/>↓</text:span></text:span></text:p>
        <text:p text:style-name="P19"><text:span text:style-name="Source_20_Text"><text:span text:style-name="T17">Model Evaluation</text:span></text:span></text:p>
        <text:p text:style-name="P19"><text:span text:style-name="Source_20_Text"><text:span text:style-name="T15"><text:s text:c="7"/>↓</text:span></text:span></text:p>
        <text:p text:style-name="P19"><text:span text:style-name="Source_20_Text"><text:span text:style-name="T17">Prediction / Deployment</text:span></text:span></text:p>
      </text:section>
      <text:h text:style-name="P16" text:outline-level="3">Explanation of Each Block</text:h>
      <text:p text:style-name="P17"><text:span text:style-name="Strong_20_Emphasis"><text:span text:style-name="T12">1. Data Collection</text:span></text:span></text:p>
      <text:list text:style-name="L1">
        <text:list-item>
          <text:p text:style-name="P20">Data is collected from databases, sensors, websites, or files.</text:p>
        </text:list-item>
        <text:list-item>
          <text:p text:style-name="P20">Example: Customer purchase records.</text:p>
        </text:list-item>
      </text:list>
      <text:p text:style-name="P17"><text:span text:style-name="Strong_20_Emphasis"><text:span text:style-name="T12">2. Data Preprocessing</text:span></text:span></text:p>
      <text:list text:style-name="L2">
        <text:list-item>
          <text:p text:style-name="P21">Removes missing values, duplicate records, and noise.</text:p>
        </text:list-item>
        <text:list-item>
          <text:p text:style-name="P21"><text:soft-page-break/>Converts raw data into a clean format.</text:p>
        </text:list-item>
      </text:list>
      <text:p text:style-name="P17"><text:span text:style-name="Strong_20_Emphasis"><text:span text:style-name="T12">3. Feature Selection</text:span></text:span></text:p>
      <text:list text:style-name="L3">
        <text:list-item>
          <text:p text:style-name="P22">Selects only important features.</text:p>
        </text:list-item>
        <text:list-item>
          <text:p text:style-name="P22">Reduces complexity and improves accuracy.</text:p>
        </text:list-item>
        <text:list-item>
          <text:p text:style-name="P22">Example: Selecting Age and Income while removing unnecessary attributes.</text:p>
        </text:list-item>
      </text:list>
      <text:p text:style-name="P17"><text:span text:style-name="Strong_20_Emphasis"><text:span text:style-name="T12">4. Model Selection</text:span></text:span></text:p>
      <text:list text:style-name="L4">
        <text:list-item>
          <text:p text:style-name="P23">Choose a suitable algorithm.</text:p>
        </text:list-item>
        <text:list-item>
          <text:p text:style-name="P23">Examples:</text:p>
          <text:list>
            <text:list-item>
              <text:p text:style-name="P23">Decision Tree</text:p>
            </text:list-item>
            <text:list-item>
              <text:p text:style-name="P23">Naïve Bayes</text:p>
            </text:list-item>
            <text:list-item>
              <text:p text:style-name="P23">SVM</text:p>
            </text:list-item>
            <text:list-item>
              <text:p text:style-name="P23">Random Forest</text:p>
            </text:list-item>
          </text:list>
        </text:list-item>
      </text:list>
      <text:p text:style-name="P17"><text:span text:style-name="Strong_20_Emphasis"><text:span text:style-name="T12">5. Model Training</text:span></text:span></text:p>
      <text:list text:style-name="L5">
        <text:list-item>
          <text:p text:style-name="P24">The algorithm learns from training data.</text:p>
        </text:list-item>
        <text:list-item>
          <text:p text:style-name="P24">Model parameters are adjusted to reduce prediction errors.</text:p>
        </text:list-item>
      </text:list>
      <text:p text:style-name="P17"><text:span text:style-name="Strong_20_Emphasis"><text:span text:style-name="T12">6. Model Evaluation</text:span></text:span></text:p>
      <text:list text:style-name="L6">
        <text:list-item>
          <text:p text:style-name="P25">Performance is tested using unseen data.</text:p>
        </text:list-item>
        <text:list-item>
          <text:p text:style-name="P25">Metrics:</text:p>
          <text:list>
            <text:list-item>
              <text:p text:style-name="P25">Accuracy</text:p>
            </text:list-item>
            <text:list-item>
              <text:p text:style-name="P25">Precision</text:p>
            </text:list-item>
            <text:list-item>
              <text:p text:style-name="P25">Recall</text:p>
            </text:list-item>
            <text:list-item>
              <text:p text:style-name="P25">F1-score</text:p>
            </text:list-item>
          </text:list>
        </text:list-item>
      </text:list>
      <text:p text:style-name="P17"><text:span text:style-name="Strong_20_Emphasis"><text:span text:style-name="T12">7. Prediction/Deployment</text:span></text:span></text:p>
      <text:list text:style-name="L7">
        <text:list-item>
          <text:p text:style-name="P26">The trained model is used for real-world predictions.</text:p>
        </text:list-item>
        <text:list-item>
          <text:p text:style-name="P26">Example: Predicting loan approval.</text:p>
        </text:list-item>
      </text:list>
      <text:p text:style-name="P27"/>
      <text:h text:style-name="P28" text:outline-level="3">Supervised Learning</text:h>
      <text:list text:style-name="L8">
        <text:list-item>
          <text:p text:style-name="P29"><text:span text:style-name="T11">Uses </text:span><text:span text:style-name="Strong_20_Emphasis"><text:span text:style-name="T12">labelled data</text:span></text:span><text:span text:style-name="T11">.</text:span></text:p>
        </text:list-item>
        <text:list-item>
          <text:p text:style-name="P30">Learns input-output relationship.</text:p>
        </text:list-item>
      </text:list>
      <text:p text:style-name="P31">Exampl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Input</text:p>
            </table:table-cell>
            <table:table-cell table:style-name="Table1.A1" office:value-type="string">
              <text:p text:style-name="P32">Output</text:p>
            </table:table-cell>
          </table:table-row>
        </table:table-header-rows>
        <table:table-row>
          <table:table-cell table:style-name="Table1.A2" office:value-type="string">
            <text:p text:style-name="P33">Student Marks</text:p>
          </table:table-cell>
          <table:table-cell table:style-name="Table1.A2" office:value-type="string">
            <text:p text:style-name="P34">Pass/Fail</text:p>
          </table:table-cell>
        </table:table-row>
      </table:table>
      <text:p text:style-name="P31">Algorithms:</text:p>
      <text:list text:style-name="L9">
        <text:list-item>
          <text:p text:style-name="P35">Decision Tree</text:p>
        </text:list-item>
        <text:list-item>
          <text:p text:style-name="P35"><text:soft-page-break/>Logistic Regression</text:p>
        </text:list-item>
        <text:list-item>
          <text:p text:style-name="P35">Naïve Bayes</text:p>
        </text:list-item>
      </text:list>
      <text:p text:style-name="P27"/>
      <text:h text:style-name="P28" text:outline-level="3">Unsupervised Learning</text:h>
      <text:list text:style-name="L10">
        <text:list-item>
          <text:p text:style-name="P36"><text:span text:style-name="T11">Uses </text:span><text:span text:style-name="Strong_20_Emphasis"><text:span text:style-name="T12">unlabelled data</text:span></text:span><text:span text:style-name="T11">.</text:span></text:p>
        </text:list-item>
        <text:list-item>
          <text:p text:style-name="P37">Finds hidden patterns.</text:p>
        </text:list-item>
      </text:list>
      <text:p text:style-name="P31">Example:</text:p>
      <text:list text:style-name="L11">
        <text:list-item>
          <text:p text:style-name="P38">Customer segmentation using K-Means.</text:p>
        </text:list-item>
      </text:list>
      <text:p text:style-name="P31">Algorithms:</text:p>
      <text:list text:style-name="L12">
        <text:list-item>
          <text:p text:style-name="P39">K-Means</text:p>
        </text:list-item>
        <text:list-item>
          <text:p text:style-name="P39">Hierarchical Clustering</text:p>
        </text:list-item>
      </text:list>
      <text:p text:style-name="P27"/>
      <text:h text:style-name="P28" text:outline-level="3">Conclusion</text:h>
      <text:p text:style-name="P31">Machine Learning consists of data collection, preprocessing, feature selection, model training, evaluation and deployment. Supervised learning predicts known outputs, whereas unsupervised learning discovers hidden patterns.</text:p>
      <text:p text:style-name="P27"/>
      <text:h text:style-name="P40" text:outline-level="1">Q2. Design a Machine Learning System for Disaster Management</text:h>
      <text:h text:style-name="P16" text:outline-level="3">Answer</text:h>
      <text:p text:style-name="P31">A disaster prediction system helps predict floods and earthquakes using historical and real-time sensor data.</text:p>
      <text:h text:style-name="P16" text:outline-level="3">System Architecture</text:h>
      <text:section text:style-name="Sect1" text:name="Section1">
        <text:p text:style-name="P18"><text:bookmark text:name="code-block-viewer"/><text:span text:style-name="Source_20_Text"><text:span text:style-name="T14">Historical Data + Real-Time Sensors</text:span></text:span></text:p>
        <text:p text:style-name="P19"><text:span text:style-name="Source_20_Text"><text:span text:style-name="T15"><text:s text:c="16"/>↓</text:span></text:span></text:p>
        <text:p text:style-name="P19"><text:span text:style-name="Source_20_Text"><text:span text:style-name="T15"><text:s text:c="6"/></text:span></text:span><text:span text:style-name="Source_20_Text"><text:span text:style-name="T17">Data Preprocessing</text:span></text:span></text:p>
        <text:p text:style-name="P19"><text:span text:style-name="Source_20_Text"><text:span text:style-name="T15"><text:s text:c="16"/>↓</text:span></text:span></text:p>
        <text:p text:style-name="P19"><text:span text:style-name="Source_20_Text"><text:span text:style-name="T15"><text:s text:c="6"/></text:span></text:span><text:span text:style-name="Source_20_Text"><text:span text:style-name="T17">Feature Selection</text:span></text:span></text:p>
        <text:p text:style-name="P19"><text:span text:style-name="Source_20_Text"><text:span text:style-name="T15"><text:s text:c="16"/>↓</text:span></text:span></text:p>
        <text:p text:style-name="P19"><text:span text:style-name="Source_20_Text"><text:span text:style-name="T15"><text:s text:c="6"/></text:span></text:span><text:span text:style-name="Source_20_Text"><text:span text:style-name="T17">Machine Learning Model</text:span></text:span></text:p>
        <text:p text:style-name="P19"><text:span text:style-name="Source_20_Text"><text:span text:style-name="T15"><text:s text:c="16"/>↓</text:span></text:span></text:p>
        <text:p text:style-name="P19"><text:span text:style-name="Source_20_Text"><text:span text:style-name="T15"><text:s text:c="7"/></text:span></text:span><text:span text:style-name="Source_20_Text"><text:span text:style-name="T17">Prediction Result</text:span></text:span></text:p>
        <text:p text:style-name="P19"><text:span text:style-name="Source_20_Text"><text:span text:style-name="T15"><text:s text:c="16"/>↓</text:span></text:span></text:p>
        <text:p text:style-name="P19"><text:span text:style-name="Source_20_Text"><text:span text:style-name="T17">Early Warning &amp; Emergency Response</text:span></text:span></text:p>
      </text:section>
      <text:p text:style-name="P27"><text:soft-page-break/></text:p>
      <text:h text:style-name="P28" text:outline-level="3">Model Choice</text:h>
      <text:p text:style-name="P31">Random Forest is suitable because:</text:p>
      <text:list text:style-name="L13">
        <text:list-item>
          <text:p text:style-name="P41">High prediction accuracy</text:p>
        </text:list-item>
        <text:list-item>
          <text:p text:style-name="P41">Handles missing values</text:p>
        </text:list-item>
        <text:list-item>
          <text:p text:style-name="P41">Works well with large datasets</text:p>
        </text:list-item>
        <text:list-item>
          <text:p text:style-name="P41">Resistant to overfitting</text:p>
        </text:list-item>
      </text:list>
      <text:p text:style-name="P27"/>
      <text:h text:style-name="P28" text:outline-level="3">Data Preprocessing</text:h>
      <text:list text:style-name="L14">
        <text:list-item>
          <text:p text:style-name="P42">Remove missing values</text:p>
        </text:list-item>
        <text:list-item>
          <text:p text:style-name="P42">Remove duplicate records</text:p>
        </text:list-item>
        <text:list-item>
          <text:p text:style-name="P42">Normalize data</text:p>
        </text:list-item>
        <text:list-item>
          <text:p text:style-name="P42">Convert categorical values into numerical values</text:p>
        </text:list-item>
      </text:list>
      <text:p text:style-name="P27"/>
      <text:h text:style-name="P28" text:outline-level="3">Feature Selection</text:h>
      <text:p text:style-name="P31">Important features:</text:p>
      <text:list text:style-name="L15">
        <text:list-item>
          <text:p text:style-name="P43">Rainfall</text:p>
        </text:list-item>
        <text:list-item>
          <text:p text:style-name="P43">River Water Level</text:p>
        </text:list-item>
        <text:list-item>
          <text:p text:style-name="P43">Soil Moisture</text:p>
        </text:list-item>
        <text:list-item>
          <text:p text:style-name="P43">Temperature</text:p>
        </text:list-item>
        <text:list-item>
          <text:p text:style-name="P43">Seismic Activity</text:p>
        </text:list-item>
        <text:list-item>
          <text:p text:style-name="P43">Ground Vibration</text:p>
        </text:list-item>
      </text:list>
      <text:p text:style-name="P27"/>
      <text:h text:style-name="P28" text:outline-level="3">(a) Training, Validation and Evaluation</text:h>
      <text:p text:style-name="P17"><text:span text:style-name="Strong_20_Emphasis"><text:span text:style-name="T12">Training</text:span></text:span></text:p>
      <text:list text:style-name="L16">
        <text:list-item>
          <text:p text:style-name="P44">Train model using historical disaster data.</text:p>
        </text:list-item>
      </text:list>
      <text:p text:style-name="P17"><text:span text:style-name="Strong_20_Emphasis"><text:span text:style-name="T12">Validation</text:span></text:span></text:p>
      <text:list text:style-name="L17">
        <text:list-item>
          <text:p text:style-name="P45">Tune model parameters.</text:p>
        </text:list-item>
      </text:list>
      <text:p text:style-name="P17"><text:span text:style-name="Strong_20_Emphasis"><text:span text:style-name="T12">Evaluation</text:span></text:span></text:p>
      <text:list text:style-name="L18">
        <text:list-item>
          <text:p text:style-name="P46">Test using unseen data.</text:p>
        </text:list-item>
      </text:list>
      <text:p text:style-name="P31">Metrics:</text:p>
      <text:list text:style-name="L19">
        <text:list-item>
          <text:p text:style-name="P47">Accuracy</text:p>
        </text:list-item>
        <text:list-item>
          <text:p text:style-name="P47">Precision</text:p>
        </text:list-item>
        <text:list-item>
          <text:p text:style-name="P47"><text:soft-page-break/>Recall</text:p>
        </text:list-item>
        <text:list-item>
          <text:p text:style-name="P47">F1-score</text:p>
        </text:list-item>
      </text:list>
      <text:p text:style-name="P27"/>
      <text:h text:style-name="P28" text:outline-level="3">(b) Early Warning and Emergency Response</text:h>
      <text:p text:style-name="P31">The system can:</text:p>
      <text:list text:style-name="L20">
        <text:list-item>
          <text:p text:style-name="P48">Predict floods before occurrence.</text:p>
        </text:list-item>
        <text:list-item>
          <text:p text:style-name="P48">Detect earthquake risks.</text:p>
        </text:list-item>
        <text:list-item>
          <text:p text:style-name="P48">Send SMS alerts.</text:p>
        </text:list-item>
        <text:list-item>
          <text:p text:style-name="P48">Notify government agencies.</text:p>
        </text:list-item>
        <text:list-item>
          <text:p text:style-name="P48">Help evacuation planning.</text:p>
        </text:list-item>
        <text:list-item>
          <text:p text:style-name="P48">Reduce loss of life and property.</text:p>
        </text:list-item>
      </text:list>
      <text:p text:style-name="P27"/>
      <text:h text:style-name="P28" text:outline-level="3">Conclusion</text:h>
      <text:p text:style-name="P31">Machine learning improves disaster prediction and enables faster emergency response using real-time monitoring.</text:p>
      <text:p text:style-name="P27"/>
      <text:h text:style-name="P40" text:outline-level="1">Q3. Apply Find-S Algorithm (Play Tennis Dataset)</text:h>
      <text:p text:style-name="P31">Positive examples only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32">Example</text:p>
            </table:table-cell>
            <table:table-cell table:style-name="Table2.A1" office:value-type="string">
              <text:p text:style-name="P32">Outlook</text:p>
            </table:table-cell>
            <table:table-cell table:style-name="Table2.A1" office:value-type="string">
              <text:p text:style-name="P32">Temperature</text:p>
            </table:table-cell>
            <table:table-cell table:style-name="Table2.A1" office:value-type="string">
              <text:p text:style-name="P32">Humidity</text:p>
            </table:table-cell>
            <table:table-cell table:style-name="Table2.A1" office:value-type="string">
              <text:p text:style-name="P32">Wind</text:p>
            </table:table-cell>
          </table:table-row>
        </table:table-header-rows>
        <table:table-row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33">Overcast</text:p>
          </table:table-cell>
          <table:table-cell table:style-name="Table2.A2" office:value-type="string">
            <text:p text:style-name="P33">Hot</text:p>
          </table:table-cell>
          <table:table-cell table:style-name="Table2.A2" office:value-type="string">
            <text:p text:style-name="P33">High</text:p>
          </table:table-cell>
          <table:table-cell table:style-name="Table2.A2" office:value-type="string">
            <text:p text:style-name="P33">Weak</text:p>
          </table:table-cell>
        </table:table-row>
        <table:table-row>
          <table:table-cell table:style-name="Table2.A2" office:value-type="string">
            <text:p text:style-name="P33">4</text:p>
          </table:table-cell>
          <table:table-cell table:style-name="Table2.A2" office:value-type="string">
            <text:p text:style-name="P33">Rainy</text:p>
          </table:table-cell>
          <table:table-cell table:style-name="Table2.A2" office:value-type="string">
            <text:p text:style-name="P33">Mild</text:p>
          </table:table-cell>
          <table:table-cell table:style-name="Table2.A2" office:value-type="string">
            <text:p text:style-name="P33">High</text:p>
          </table:table-cell>
          <table:table-cell table:style-name="Table2.A2" office:value-type="string">
            <text:p text:style-name="P33">Weak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A2" office:value-type="string">
            <text:p text:style-name="P33">Rainy</text:p>
          </table:table-cell>
          <table:table-cell table:style-name="Table2.A2" office:value-type="string">
            <text:p text:style-name="P33">Cool</text:p>
          </table:table-cell>
          <table:table-cell table:style-name="Table2.A2" office:value-type="string">
            <text:p text:style-name="P33">Normal</text:p>
          </table:table-cell>
          <table:table-cell table:style-name="Table2.A2" office:value-type="string">
            <text:p text:style-name="P33">Weak</text:p>
          </table:table-cell>
        </table:table-row>
        <table:table-row>
          <table:table-cell table:style-name="Table2.A5" office:value-type="string">
            <text:p text:style-name="P33">7</text:p>
          </table:table-cell>
          <table:table-cell table:style-name="Table2.A5" office:value-type="string">
            <text:p text:style-name="P33">Overcast</text:p>
          </table:table-cell>
          <table:table-cell table:style-name="Table2.A5" office:value-type="string">
            <text:p text:style-name="P33">Mild</text:p>
          </table:table-cell>
          <table:table-cell table:style-name="Table2.A5" office:value-type="string">
            <text:p text:style-name="P33">Normal</text:p>
          </table:table-cell>
          <table:table-cell table:style-name="Table2.A5" office:value-type="string">
            <text:p text:style-name="P34">Strong</text:p>
          </table:table-cell>
        </table:table-row>
      </table:table>
      <text:p text:style-name="P27"/>
      <text:h text:style-name="P28" text:outline-level="3">Step 1</text:h>
      <text:p text:style-name="P31">Initial Hypothesis</text:p>
      <text:section text:style-name="Sect1" text:name="Section2">
        <text:p text:style-name="P18"><text:bookmark text:name="code-block-viewer Copy 1"/><text:span text:style-name="Source_20_Text"><text:span text:style-name="T14">S0 = &lt;Ø, Ø, Ø, Ø&gt;</text:span></text:span></text:p>
      </text:section>
      <text:p text:style-name="P27"/>
      <text:h text:style-name="P28" text:outline-level="3">Step 2 (Example 3)</text:h>
      <text:section text:style-name="Sect1" text:name="Section3">
        <text:p text:style-name="P18"><text:bookmark text:name="code-block-viewer Copy 2"/><text:span text:style-name="Source_20_Text"><text:span text:style-name="T14">S1 = &lt;Overcast, Hot, High, Weak&gt;</text:span></text:span></text:p>
      </text:section>
      <text:p text:style-name="P27"/>
      <text:h text:style-name="P28" text:outline-level="3"><text:soft-page-break/>Step 3 (Example 4)</text:h>
      <text:p text:style-name="P31">Compare:</text:p>
      <text:p text:style-name="P49">Outlook:<text:line-break/>Overcast ≠ Rainy → ?</text:p>
      <text:p text:style-name="P49">Temperature:<text:line-break/>Hot ≠ Mild → ?</text:p>
      <text:p text:style-name="P49">Humidity:<text:line-break/>High = High</text:p>
      <text:p text:style-name="P49">Wind:<text:line-break/>Weak = Weak</text:p>
      <text:section text:style-name="Sect1" text:name="Section4">
        <text:p text:style-name="P18"><text:bookmark text:name="code-block-viewer Copy 3"/><text:span text:style-name="Source_20_Text"><text:span text:style-name="T13">S2 = &lt;?, ?, High, Weak&gt;</text:span></text:span></text:p>
      </text:section>
      <text:p text:style-name="P27"/>
      <text:h text:style-name="P28" text:outline-level="3">Step 4 (Example 5)</text:h>
      <text:p text:style-name="P31">Humidity:<text:line-break/>High ≠ Normal → ?</text:p>
      <text:p text:style-name="P49">Wind:<text:line-break/>Weak = Weak</text:p>
      <text:section text:style-name="Sect1" text:name="Section5">
        <text:p text:style-name="P18"><text:bookmark text:name="code-block-viewer Copy 4"/><text:span text:style-name="Source_20_Text"><text:span text:style-name="T13">S3 = &lt;?, ?, ?, Weak&gt;</text:span></text:span></text:p>
      </text:section>
      <text:p text:style-name="P27"/>
      <text:h text:style-name="P28" text:outline-level="3">Step 5 (Example 7)</text:h>
      <text:p text:style-name="P31">Wind:<text:line-break/>Weak ≠ Strong → ?</text:p>
      <text:section text:style-name="Sect1" text:name="Section6">
        <text:p text:style-name="P18"><text:bookmark text:name="code-block-viewer Copy 5"/><text:span text:style-name="Source_20_Text"><text:span text:style-name="T13">S4 = &lt;?, ?, ?, ?&gt;</text:span></text:span></text:p>
      </text:section>
      <text:p text:style-name="P27"/>
      <text:h text:style-name="P28" text:outline-level="3">Final Hypothesis</text:h>
      <text:section text:style-name="Sect1" text:name="Section7">
        <text:p text:style-name="P18"><text:bookmark text:name="code-block-viewer Copy 6"/><text:span text:style-name="Source_20_Text"><text:span text:style-name="T13">&lt;?, ?, ?, ?&gt;</text:span></text:span></text:p>
      </text:section>
      <text:p text:style-name="P31">Meaning:<text:line-break/>Every attribute becomes generalized because the positive examples differ in every attribute.</text:p>
      <text:p text:style-name="P27"/>
      <text:h text:style-name="P40" text:outline-level="1"><text:soft-page-break/>Q4. Candidate Elimination Algorithm</text:h>
      <text:p text:style-name="P31">Dataset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32">Example</text:p>
            </table:table-cell>
            <table:table-cell table:style-name="Table3.A1" office:value-type="string">
              <text:p text:style-name="P32">Weather</text:p>
            </table:table-cell>
            <table:table-cell table:style-name="Table3.A1" office:value-type="string">
              <text:p text:style-name="P32">Temperature</text:p>
            </table:table-cell>
            <table:table-cell table:style-name="Table3.A1" office:value-type="string">
              <text:p text:style-name="P32">Humidity</text:p>
            </table:table-cell>
            <table:table-cell table:style-name="Table3.A1" office:value-type="string">
              <text:p text:style-name="P32">Wind</text:p>
            </table:table-cell>
            <table:table-cell table:style-name="Table3.A1" office:value-type="string">
              <text:p text:style-name="P32">Enjoy Sport</text:p>
            </table:table-cell>
          </table:table-row>
        </table:table-header-rows>
        <table:table-row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Sunny</text:p>
          </table:table-cell>
          <table:table-cell table:style-name="Table3.A2" office:value-type="string">
            <text:p text:style-name="P33">Warm</text:p>
          </table:table-cell>
          <table:table-cell table:style-name="Table3.A2" office:value-type="string">
            <text:p text:style-name="P33">Normal</text:p>
          </table:table-cell>
          <table:table-cell table:style-name="Table3.A2" office:value-type="string">
            <text:p text:style-name="P33">Weak</text:p>
          </table:table-cell>
          <table:table-cell table:style-name="Table3.A2" office:value-type="string">
            <text:p text:style-name="P33">Yes</text:p>
          </table:table-cell>
        </table:table-row>
        <table:table-row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3">Sunny</text:p>
          </table:table-cell>
          <table:table-cell table:style-name="Table3.A2" office:value-type="string">
            <text:p text:style-name="P33">Warm</text:p>
          </table:table-cell>
          <table:table-cell table:style-name="Table3.A2" office:value-type="string">
            <text:p text:style-name="P33">High</text:p>
          </table:table-cell>
          <table:table-cell table:style-name="Table3.A2" office:value-type="string">
            <text:p text:style-name="P33">Strong</text:p>
          </table:table-cell>
          <table:table-cell table:style-name="Table3.A2" office:value-type="string">
            <text:p text:style-name="P33">Yes</text:p>
          </table:table-cell>
        </table:table-row>
        <table:table-row>
          <table:table-cell table:style-name="Table3.A2" office:value-type="string">
            <text:p text:style-name="P33">3</text:p>
          </table:table-cell>
          <table:table-cell table:style-name="Table3.A2" office:value-type="string">
            <text:p text:style-name="P33">Rainy</text:p>
          </table:table-cell>
          <table:table-cell table:style-name="Table3.A2" office:value-type="string">
            <text:p text:style-name="P33">Cold</text:p>
          </table:table-cell>
          <table:table-cell table:style-name="Table3.A2" office:value-type="string">
            <text:p text:style-name="P33">High</text:p>
          </table:table-cell>
          <table:table-cell table:style-name="Table3.A2" office:value-type="string">
            <text:p text:style-name="P33">Weak</text:p>
          </table:table-cell>
          <table:table-cell table:style-name="Table3.A2" office:value-type="string">
            <text:p text:style-name="P33">No</text:p>
          </table:table-cell>
        </table:table-row>
        <table:table-row>
          <table:table-cell table:style-name="Table3.A2" office:value-type="string">
            <text:p text:style-name="P33">4</text:p>
          </table:table-cell>
          <table:table-cell table:style-name="Table3.A2" office:value-type="string">
            <text:p text:style-name="P33">Sunny</text:p>
          </table:table-cell>
          <table:table-cell table:style-name="Table3.A2" office:value-type="string">
            <text:p text:style-name="P33">Cold</text:p>
          </table:table-cell>
          <table:table-cell table:style-name="Table3.A2" office:value-type="string">
            <text:p text:style-name="P33">Normal</text:p>
          </table:table-cell>
          <table:table-cell table:style-name="Table3.A2" office:value-type="string">
            <text:p text:style-name="P33">Weak</text:p>
          </table:table-cell>
          <table:table-cell table:style-name="Table3.A2" office:value-type="string">
            <text:p text:style-name="P33">Yes</text:p>
          </table:table-cell>
        </table:table-row>
        <table:table-row>
          <table:table-cell table:style-name="Table3.A6" office:value-type="string">
            <text:p text:style-name="P33">5</text:p>
          </table:table-cell>
          <table:table-cell table:style-name="Table3.A6" office:value-type="string">
            <text:p text:style-name="P33">Rainy</text:p>
          </table:table-cell>
          <table:table-cell table:style-name="Table3.A6" office:value-type="string">
            <text:p text:style-name="P33">Warm</text:p>
          </table:table-cell>
          <table:table-cell table:style-name="Table3.A6" office:value-type="string">
            <text:p text:style-name="P33">Normal</text:p>
          </table:table-cell>
          <table:table-cell table:style-name="Table3.A6" office:value-type="string">
            <text:p text:style-name="P33">Strong</text:p>
          </table:table-cell>
          <table:table-cell table:style-name="Table3.A6" office:value-type="string">
            <text:p text:style-name="P34">No</text:p>
          </table:table-cell>
        </table:table-row>
      </table:table>
      <text:p text:style-name="P27"/>
      <text:h text:style-name="P28" text:outline-level="3">Initialization</text:h>
      <text:section text:style-name="Sect1" text:name="Section8">
        <text:p text:style-name="P18"><text:bookmark text:name="code-block-viewer Copy 7"/><text:span text:style-name="Source_20_Text"><text:span text:style-name="T13">S0=&lt;Ø,Ø,Ø,Ø&gt;</text:span></text:span></text:p>
        <text:p text:style-name="P50"/>
        <text:p text:style-name="P19"><text:span text:style-name="Source_20_Text"><text:span text:style-name="T18">G0=&lt;?,?,?,?&gt;</text:span></text:span></text:p>
      </text:section>
      <text:p text:style-name="P27"/>
      <text:h text:style-name="P28" text:outline-level="3">Example 1 (Positive)</text:h>
      <text:section text:style-name="Sect1" text:name="Section9">
        <text:p text:style-name="P18"><text:bookmark text:name="code-block-viewer Copy 8"/><text:span text:style-name="Source_20_Text"><text:span text:style-name="T13">S=&lt;Sunny,Warm,Normal,Weak&gt;</text:span></text:span></text:p>
        <text:p text:style-name="P50"/>
        <text:p text:style-name="P19"><text:span text:style-name="Source_20_Text"><text:span text:style-name="T18">G=&lt;?,?,?,?&gt;</text:span></text:span></text:p>
      </text:section>
      <text:p text:style-name="P27"/>
      <text:h text:style-name="P28" text:outline-level="3">Example 2 (Positive)</text:h>
      <text:p text:style-name="P31">Humidity differs</text:p>
      <text:p text:style-name="P49">Wind differs</text:p>
      <text:section text:style-name="Sect1" text:name="Section10">
        <text:p text:style-name="P18"><text:bookmark text:name="code-block-viewer Copy 9"/><text:span text:style-name="Source_20_Text"><text:span text:style-name="T13">S=&lt;Sunny,Warm,?,?&gt;</text:span></text:span></text:p>
      </text:section>
      <text:p text:style-name="P27"/>
      <text:h text:style-name="P28" text:outline-level="3">Example 3 (Negative)</text:h>
      <text:p text:style-name="P31">Specialize G to exclude negative example.</text:p>
      <text:section text:style-name="Sect1" text:name="Section11">
        <text:p text:style-name="P18"><text:bookmark text:name="code-block-viewer Copy 10"/><text:span text:style-name="Source_20_Text"><text:span text:style-name="T13">G=&lt;Sunny,?,?,?&gt;</text:span></text:span></text:p>
      </text:section>
      <text:p text:style-name="P27"/>
      <text:h text:style-name="P28" text:outline-level="3">Example 4 (Positive)</text:h>
      <text:p text:style-name="P31">Temperature differs</text:p>
      <text:section text:style-name="Sect1" text:name="Section12">
        <text:p text:style-name="P18"><text:bookmark text:name="code-block-viewer Copy 11"/><text:soft-page-break/><text:span text:style-name="Source_20_Text"><text:span text:style-name="T13">S=&lt;Sunny,?, ?,?&gt;</text:span></text:span></text:p>
      </text:section>
      <text:p text:style-name="P27"/>
      <text:h text:style-name="P28" text:outline-level="3">Example 5 (Negative)</text:h>
      <text:p text:style-name="P31">Already excluded by Weather.</text:p>
      <text:p text:style-name="P49">No further change.</text:p>
      <text:p text:style-name="P27"/>
      <text:h text:style-name="P28" text:outline-level="3">Final Boundaries</text:h>
      <text:p text:style-name="P31">Specific Boundary</text:p>
      <text:section text:style-name="Sect1" text:name="Section13">
        <text:p text:style-name="P18"><text:bookmark text:name="code-block-viewer Copy 12"/><text:span text:style-name="Source_20_Text"><text:span text:style-name="T13">S=&lt;Sunny,?,?,?&gt;</text:span></text:span></text:p>
      </text:section>
      <text:p text:style-name="P31">General Boundary</text:p>
      <text:section text:style-name="Sect1" text:name="Section14">
        <text:p text:style-name="P18"><text:bookmark text:name="code-block-viewer Copy 13"/><text:span text:style-name="Source_20_Text"><text:span text:style-name="T13">G=&lt;Sunny,?,?,?&gt;</text:span></text:span></text:p>
      </text:section>
      <text:p text:style-name="P27"/>
      <text:h text:style-name="P28" text:outline-level="3">Version Space</text:h>
      <text:p text:style-name="P31">Contains all hypotheses between S and G.</text:p>
      <text:p text:style-name="P27"/>
      <text:h text:style-name="P40" text:outline-level="1">Q5. Find-S Algorithm (Customer Purchase Dataset)</text:h>
      <text:p text:style-name="P31">Positive example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32">Example</text:p>
            </table:table-cell>
            <table:table-cell table:style-name="Table4.A1" office:value-type="string">
              <text:p text:style-name="P32">Age</text:p>
            </table:table-cell>
            <table:table-cell table:style-name="Table4.A1" office:value-type="string">
              <text:p text:style-name="P32">Income</text:p>
            </table:table-cell>
            <table:table-cell table:style-name="Table4.A1" office:value-type="string">
              <text:p text:style-name="P32">Student</text:p>
            </table:table-cell>
            <table:table-cell table:style-name="Table4.A1" office:value-type="string">
              <text:p text:style-name="P32">Credit Rating</text:p>
            </table:table-cell>
          </table:table-row>
        </table:table-header-rows>
        <table:table-row>
          <table:table-cell table:style-name="Table4.A2" office:value-type="string">
            <text:p text:style-name="P33">3</text:p>
          </table:table-cell>
          <table:table-cell table:style-name="Table4.A2" office:value-type="string">
            <text:p text:style-name="P33">Middle</text:p>
          </table:table-cell>
          <table:table-cell table:style-name="Table4.A2" office:value-type="string">
            <text:p text:style-name="P33">High</text:p>
          </table:table-cell>
          <table:table-cell table:style-name="Table4.A2" office:value-type="string">
            <text:p text:style-name="P33">No</text:p>
          </table:table-cell>
          <table:table-cell table:style-name="Table4.A2" office:value-type="string">
            <text:p text:style-name="P33">Fair</text:p>
          </table:table-cell>
        </table:table-row>
        <table:table-row>
          <table:table-cell table:style-name="Table4.A3" office:value-type="string">
            <text:p text:style-name="P33">4</text:p>
          </table:table-cell>
          <table:table-cell table:style-name="Table4.A3" office:value-type="string">
            <text:p text:style-name="P33">Senior</text:p>
          </table:table-cell>
          <table:table-cell table:style-name="Table4.A3" office:value-type="string">
            <text:p text:style-name="P33">Medium</text:p>
          </table:table-cell>
          <table:table-cell table:style-name="Table4.A3" office:value-type="string">
            <text:p text:style-name="P33">No</text:p>
          </table:table-cell>
          <table:table-cell table:style-name="Table4.A3" office:value-type="string">
            <text:p text:style-name="P34">Fair</text:p>
          </table:table-cell>
        </table:table-row>
      </table:table>
      <text:p text:style-name="P27"/>
      <text:h text:style-name="P28" text:outline-level="3">Initial Hypothesis</text:h>
      <text:section text:style-name="Sect1" text:name="Section15">
        <text:p text:style-name="P18"><text:bookmark text:name="code-block-viewer Copy 14"/><text:span text:style-name="Source_20_Text"><text:span text:style-name="T13">S0=&lt;Ø,Ø,Ø,Ø&gt;</text:span></text:span></text:p>
      </text:section>
      <text:p text:style-name="P27"/>
      <text:h text:style-name="P28" text:outline-level="3">Example 3</text:h>
      <text:section text:style-name="Sect1" text:name="Section16">
        <text:p text:style-name="P18"><text:bookmark text:name="code-block-viewer Copy 15"/><text:span text:style-name="Source_20_Text"><text:span text:style-name="T13">S1=&lt;Middle,High,No,Fair&gt;</text:span></text:span></text:p>
      </text:section>
      <text:p text:style-name="P27"/>
      <text:h text:style-name="P28" text:outline-level="3">Example 4</text:h>
      <text:p text:style-name="P31">Age differs</text:p>
      <text:p text:style-name="P49"><text:soft-page-break/>Income differs</text:p>
      <text:p text:style-name="P49">Student same</text:p>
      <text:p text:style-name="P49">Credit Rating same</text:p>
      <text:section text:style-name="Sect1" text:name="Section17">
        <text:p text:style-name="P18"><text:bookmark text:name="code-block-viewer Copy 16"/><text:span text:style-name="Source_20_Text"><text:span text:style-name="T13">S2=&lt;?,?,No,Fair&gt;</text:span></text:span></text:p>
      </text:section>
      <text:p text:style-name="P27"/>
      <text:h text:style-name="P28" text:outline-level="3">Final Hypothesis</text:h>
      <text:section text:style-name="Sect1" text:name="Section18">
        <text:p text:style-name="P18"><text:bookmark text:name="code-block-viewer Copy 17"/><text:span text:style-name="Source_20_Text"><text:span text:style-name="T13">&lt;?, ?, No, Fair&gt;</text:span></text:span></text:p>
      </text:section>
      <text:p text:style-name="P27"/>
      <text:h text:style-name="P28" text:outline-level="3">Interpretation</text:h>
      <text:p text:style-name="P31">The customer is likely to buy a product if:</text:p>
      <text:list text:style-name="L21">
        <text:list-item>
          <text:p text:style-name="P51">Student = No</text:p>
        </text:list-item>
        <text:list-item>
          <text:p text:style-name="P51">Credit Rating = Fair</text:p>
        </text:list-item>
        <text:list-item>
          <text:p text:style-name="P51">Age and Income can be any value</text:p>
        </text:list-item>
      </text:list>
      <text:h text:style-name="P15" text:outline-level="1">Q6. Apply the Find-S Algorithm (Workout Dataset)</text:h>
      <text:h text:style-name="P16" text:outline-level="3">Datase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P32">Example</text:p>
            </table:table-cell>
            <table:table-cell table:style-name="Table5.A1" office:value-type="string">
              <text:p text:style-name="P32">Weather</text:p>
            </table:table-cell>
            <table:table-cell table:style-name="Table5.A1" office:value-type="string">
              <text:p text:style-name="P32">Temperature</text:p>
            </table:table-cell>
            <table:table-cell table:style-name="Table5.A1" office:value-type="string">
              <text:p text:style-name="P32">Time</text:p>
            </table:table-cell>
            <table:table-cell table:style-name="Table5.A1" office:value-type="string">
              <text:p text:style-name="P32">Mood</text:p>
            </table:table-cell>
            <table:table-cell table:style-name="Table5.A1" office:value-type="string">
              <text:p text:style-name="P32">Workout</text:p>
            </table:table-cell>
          </table:table-row>
        </table:table-header-rows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Sunny</text:p>
          </table:table-cell>
          <table:table-cell table:style-name="Table5.A2" office:value-type="string">
            <text:p text:style-name="P33">Hot</text:p>
          </table:table-cell>
          <table:table-cell table:style-name="Table5.A2" office:value-type="string">
            <text:p text:style-name="P33">Morning</text:p>
          </table:table-cell>
          <table:table-cell table:style-name="Table5.A2" office:value-type="string">
            <text:p text:style-name="P33">Tired</text:p>
          </table:table-cell>
          <table:table-cell table:style-name="Table5.A2" office:value-type="string">
            <text:p text:style-name="P33">No</text:p>
          </table:table-cell>
        </table:table-row>
        <table:table-row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3">Rainy</text:p>
          </table:table-cell>
          <table:table-cell table:style-name="Table5.A2" office:value-type="string">
            <text:p text:style-name="P33">Mild</text:p>
          </table:table-cell>
          <table:table-cell table:style-name="Table5.A2" office:value-type="string">
            <text:p text:style-name="P33">Evening</text:p>
          </table:table-cell>
          <table:table-cell table:style-name="Table5.A2" office:value-type="string">
            <text:p text:style-name="P33">Happy</text:p>
          </table:table-cell>
          <table:table-cell table:style-name="Table5.A2" office:value-type="string">
            <text:p text:style-name="P33">Yes</text:p>
          </table:table-cell>
        </table:table-row>
        <table:table-row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33">Sunny</text:p>
          </table:table-cell>
          <table:table-cell table:style-name="Table5.A2" office:value-type="string">
            <text:p text:style-name="P33">Mild</text:p>
          </table:table-cell>
          <table:table-cell table:style-name="Table5.A2" office:value-type="string">
            <text:p text:style-name="P33">Evening</text:p>
          </table:table-cell>
          <table:table-cell table:style-name="Table5.A2" office:value-type="string">
            <text:p text:style-name="P33">Happy</text:p>
          </table:table-cell>
          <table:table-cell table:style-name="Table5.A2" office:value-type="string">
            <text:p text:style-name="P33">Yes</text:p>
          </table:table-cell>
        </table:table-row>
        <table:table-row>
          <table:table-cell table:style-name="Table5.A5" office:value-type="string">
            <text:p text:style-name="P33">4</text:p>
          </table:table-cell>
          <table:table-cell table:style-name="Table5.A5" office:value-type="string">
            <text:p text:style-name="P33">Cloudy</text:p>
          </table:table-cell>
          <table:table-cell table:style-name="Table5.A5" office:value-type="string">
            <text:p text:style-name="P33">Cool</text:p>
          </table:table-cell>
          <table:table-cell table:style-name="Table5.A5" office:value-type="string">
            <text:p text:style-name="P33">Morning</text:p>
          </table:table-cell>
          <table:table-cell table:style-name="Table5.A5" office:value-type="string">
            <text:p text:style-name="P33">Happy</text:p>
          </table:table-cell>
          <table:table-cell table:style-name="Table5.A5" office:value-type="string">
            <text:p text:style-name="P34">Yes</text:p>
          </table:table-cell>
        </table:table-row>
      </table:table>
      <text:p text:style-name="P17"><text:span text:style-name="T11">Only </text:span><text:span text:style-name="Strong_20_Emphasis"><text:span text:style-name="T12">positive examples</text:span></text:span><text:span text:style-name="T11"> (2, 3, and 4) are considered.</text:span></text:p>
      <text:h text:style-name="P16" text:outline-level="3">Step 1: Initialize</text:h>
      <text:p text:style-name="P31">Initial hypothesis:</text:p>
      <text:p text:style-name="P17"><text:span text:style-name="Strong_20_Emphasis"><text:span text:style-name="T12">S₀ = &lt;Ø, Ø, Ø, Ø&gt;</text:span></text:span></text:p>
      <text:h text:style-name="P16" text:outline-level="3">Step 2: Process Example 2 (Positive)</text:h>
      <text:p text:style-name="P17"><text:span text:style-name="T11">S₁ = </text:span><text:span text:style-name="Strong_20_Emphasis"><text:span text:style-name="T12">&lt;Rainy, Mild, Evening, Happy&gt;</text:span></text:span></text:p>
      <text:h text:style-name="P16" text:outline-level="3"><text:soft-page-break/>Step 3: Process Example 3 (Positive)</text:h>
      <text:p text:style-name="P31">Compare with Example 3:</text:p>
      <text:list text:style-name="L22">
        <text:list-item>
          <text:p text:style-name="P52">Weather: Rainy ≠ Sunny → ?</text:p>
        </text:list-item>
        <text:list-item>
          <text:p text:style-name="P52">Temperature: Mild = Mild</text:p>
        </text:list-item>
        <text:list-item>
          <text:p text:style-name="P52">Time: Evening = Evening</text:p>
        </text:list-item>
        <text:list-item>
          <text:p text:style-name="P52">Mood: Happy = Happy</text:p>
        </text:list-item>
      </text:list>
      <text:p text:style-name="P31">Updated hypothesis:</text:p>
      <text:p text:style-name="P17"><text:span text:style-name="Strong_20_Emphasis"><text:span text:style-name="T12">S₂ = &lt;?, Mild, Evening, Happy&gt;</text:span></text:span></text:p>
      <text:h text:style-name="P16" text:outline-level="3">Step 4: Process Example 4 (Positive)</text:h>
      <text:p text:style-name="P31">Compare with Example 4:</text:p>
      <text:list text:style-name="L23">
        <text:list-item>
          <text:p text:style-name="P53">Weather: ? remains ?</text:p>
        </text:list-item>
        <text:list-item>
          <text:p text:style-name="P53">Temperature: Mild ≠ Cool → ?</text:p>
        </text:list-item>
        <text:list-item>
          <text:p text:style-name="P53">Time: Evening ≠ Morning → ?</text:p>
        </text:list-item>
        <text:list-item>
          <text:p text:style-name="P53">Mood: Happy = Happy</text:p>
        </text:list-item>
      </text:list>
      <text:p text:style-name="P31">Updated hypothesis:</text:p>
      <text:p text:style-name="P17"><text:span text:style-name="Strong_20_Emphasis"><text:span text:style-name="T12">S₃ = &lt;?, ?, ?, Happy&gt;</text:span></text:span></text:p>
      <text:h text:style-name="P16" text:outline-level="3">Final Hypothesis</text:h>
      <text:p text:style-name="P17"><text:span text:style-name="Strong_20_Emphasis"><text:span text:style-name="T12">&lt;?, ?, ?, Happy&gt;</text:span></text:span></text:p>
      <text:h text:style-name="P16" text:outline-level="3">Conclusion</text:h>
      <text:p text:style-name="P17"><text:span text:style-name="T11">The Find-S algorithm concludes that the only common condition among all positive examples is that the person's </text:span><text:span text:style-name="Strong_20_Emphasis"><text:span text:style-name="T12">Mood = Happy</text:span></text:span><text:span text:style-name="T11">. Weather, Temperature, and Time can be any value.</text:span></text:p>
      <text:p text:style-name="P27"/>
      <text:h text:style-name="P40" text:outline-level="1">Q7. Apply the Find-S Algorithm (Loan Approval Dataset)</text:h>
      <text:h text:style-name="P16" text:outline-level="3">Dataset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P32">Example</text:p>
            </table:table-cell>
            <table:table-cell table:style-name="Table6.A1" office:value-type="string">
              <text:p text:style-name="P32">Employment</text:p>
            </table:table-cell>
            <table:table-cell table:style-name="Table6.A1" office:value-type="string">
              <text:p text:style-name="P32">Salary</text:p>
            </table:table-cell>
            <table:table-cell table:style-name="Table6.A1" office:value-type="string">
              <text:p text:style-name="P32">Credit Score</text:p>
            </table:table-cell>
            <table:table-cell table:style-name="Table6.A1" office:value-type="string">
              <text:p text:style-name="P32">Loan History</text:p>
            </table:table-cell>
            <table:table-cell table:style-name="Table6.A1" office:value-type="string">
              <text:p text:style-name="P32">Loan Approved</text:p>
            </table:table-cell>
          </table:table-row>
        </table:table-header-rows>
        <table:table-row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3">Employed</text:p>
          </table:table-cell>
          <table:table-cell table:style-name="Table6.A2" office:value-type="string">
            <text:p text:style-name="P33">High</text:p>
          </table:table-cell>
          <table:table-cell table:style-name="Table6.A2" office:value-type="string">
            <text:p text:style-name="P33">Good</text:p>
          </table:table-cell>
          <table:table-cell table:style-name="Table6.A2" office:value-type="string">
            <text:p text:style-name="P33">Clean</text:p>
          </table:table-cell>
          <table:table-cell table:style-name="Table6.A2" office:value-type="string">
            <text:p text:style-name="P33">Yes</text:p>
          </table:table-cell>
        </table:table-row>
        <table:table-row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33">Employed</text:p>
          </table:table-cell>
          <table:table-cell table:style-name="Table6.A2" office:value-type="string">
            <text:p text:style-name="P33">Medium</text:p>
          </table:table-cell>
          <table:table-cell table:style-name="Table6.A2" office:value-type="string">
            <text:p text:style-name="P33">Good</text:p>
          </table:table-cell>
          <table:table-cell table:style-name="Table6.A2" office:value-type="string">
            <text:p text:style-name="P33">Clean</text:p>
          </table:table-cell>
          <table:table-cell table:style-name="Table6.A2" office:value-type="string">
            <text:p text:style-name="P33">Yes</text:p>
          </table:table-cell>
        </table:table-row>
        <table:table-row>
          <table:table-cell table:style-name="Table6.A2" office:value-type="string">
            <text:p text:style-name="P33">3</text:p>
          </table:table-cell>
          <table:table-cell table:style-name="Table6.A2" office:value-type="string">
            <text:p text:style-name="P33">Unemployed</text:p>
          </table:table-cell>
          <table:table-cell table:style-name="Table6.A2" office:value-type="string">
            <text:p text:style-name="P33">Low</text:p>
          </table:table-cell>
          <table:table-cell table:style-name="Table6.A2" office:value-type="string">
            <text:p text:style-name="P33">Poor</text:p>
          </table:table-cell>
          <table:table-cell table:style-name="Table6.A2" office:value-type="string">
            <text:p text:style-name="P33">Bad</text:p>
          </table:table-cell>
          <table:table-cell table:style-name="Table6.A2" office:value-type="string">
            <text:p text:style-name="P33">No</text:p>
          </table:table-cell>
        </table:table-row>
        <table:table-row>
          <table:table-cell table:style-name="Table6.A5" office:value-type="string">
            <text:p text:style-name="P33">4</text:p>
          </table:table-cell>
          <table:table-cell table:style-name="Table6.A5" office:value-type="string">
            <text:p text:style-name="P33">Employed</text:p>
          </table:table-cell>
          <table:table-cell table:style-name="Table6.A5" office:value-type="string">
            <text:p text:style-name="P33">Medium</text:p>
          </table:table-cell>
          <table:table-cell table:style-name="Table6.A5" office:value-type="string">
            <text:p text:style-name="P33">Excellent</text:p>
          </table:table-cell>
          <table:table-cell table:style-name="Table6.A5" office:value-type="string">
            <text:p text:style-name="P33">Clean</text:p>
          </table:table-cell>
          <table:table-cell table:style-name="Table6.A5" office:value-type="string">
            <text:p text:style-name="P34">Yes</text:p>
          </table:table-cell>
        </table:table-row>
      </table:table>
      <text:p text:style-name="P31"><text:soft-page-break/>Only positive examples (1, 2, and 4) are used.</text:p>
      <text:h text:style-name="P16" text:outline-level="3">Step 1: Initialize</text:h>
      <text:p text:style-name="P17"><text:span text:style-name="Strong_20_Emphasis"><text:span text:style-name="T12">S₀ = &lt;Ø, Ø, Ø, Ø&gt;</text:span></text:span></text:p>
      <text:h text:style-name="P16" text:outline-level="3">Step 2: Example 1</text:h>
      <text:p text:style-name="P17"><text:span text:style-name="Strong_20_Emphasis"><text:span text:style-name="T12">S₁ = &lt;Employed, High, Good, Clean&gt;</text:span></text:span></text:p>
      <text:h text:style-name="P16" text:outline-level="3">Step 3: Example 2</text:h>
      <text:list text:style-name="L24">
        <text:list-item>
          <text:p text:style-name="P54">Employment: Same</text:p>
        </text:list-item>
        <text:list-item>
          <text:p text:style-name="P54">Salary: High ≠ Medium → ?</text:p>
        </text:list-item>
        <text:list-item>
          <text:p text:style-name="P54">Credit Score: Same</text:p>
        </text:list-item>
        <text:list-item>
          <text:p text:style-name="P54">Loan History: Same</text:p>
        </text:list-item>
      </text:list>
      <text:p text:style-name="P17"><text:span text:style-name="Strong_20_Emphasis"><text:span text:style-name="T12">S₂ = &lt;Employed, ?, Good, Clean&gt;</text:span></text:span></text:p>
      <text:h text:style-name="P16" text:outline-level="3">Step 4: Example 4</text:h>
      <text:list text:style-name="L25">
        <text:list-item>
          <text:p text:style-name="P55">Employment: Same</text:p>
        </text:list-item>
        <text:list-item>
          <text:p text:style-name="P55">Salary: ? remains ?</text:p>
        </text:list-item>
        <text:list-item>
          <text:p text:style-name="P55">Credit Score: Good ≠ Excellent → ?</text:p>
        </text:list-item>
        <text:list-item>
          <text:p text:style-name="P55">Loan History: Same</text:p>
        </text:list-item>
      </text:list>
      <text:p text:style-name="P17"><text:span text:style-name="Strong_20_Emphasis"><text:span text:style-name="T12">S₃ = &lt;Employed, ?, ?, Clean&gt;</text:span></text:span></text:p>
      <text:h text:style-name="P16" text:outline-level="3">Final Hypothesis</text:h>
      <text:p text:style-name="P17"><text:span text:style-name="Strong_20_Emphasis"><text:span text:style-name="T12">&lt;Employed, ?, ?, Clean&gt;</text:span></text:span></text:p>
      <text:h text:style-name="P16" text:outline-level="3">Conclusion</text:h>
      <text:p text:style-name="P17"><text:span text:style-name="T11">A loan is likely to be approved if the applicant is </text:span><text:span text:style-name="Strong_20_Emphasis"><text:span text:style-name="T12">Employed</text:span></text:span><text:span text:style-name="T11"> and has a </text:span><text:span text:style-name="Strong_20_Emphasis"><text:span text:style-name="T12">Clean Loan History</text:span></text:span><text:span text:style-name="T11">, while Salary and Credit Score may vary.</text:span></text:p>
      <text:p text:style-name="P27"/>
      <text:h text:style-name="P40" text:outline-level="1">Q8. Candidate Elimination Algorithm (Customer Subscription)</text:h>
      <text:h text:style-name="P16" text:outline-level="3">Initialization</text:h>
      <text:p text:style-name="P31">Specific Boundary:</text:p>
      <text:p text:style-name="P17"><text:span text:style-name="Strong_20_Emphasis"><text:span text:style-name="T12">S₀ = &lt;Ø, Ø, Ø, Ø&gt;</text:span></text:span></text:p>
      <text:p text:style-name="P49">General Boundary:</text:p>
      <text:p text:style-name="P17"><text:soft-page-break/><text:span text:style-name="Strong_20_Emphasis"><text:span text:style-name="T12">G₀ = &lt;?, ?, ?, ?&gt;</text:span></text:span></text:p>
      <text:h text:style-name="P16" text:outline-level="3">Example 1 (Positive)</text:h>
      <text:p text:style-name="P17"><text:span text:style-name="T11">S = </text:span><text:span text:style-name="Strong_20_Emphasis"><text:span text:style-name="T12">&lt;Young, High, Frequent, Mobile&gt;</text:span></text:span></text:p>
      <text:p text:style-name="P17"><text:span text:style-name="T11">G = </text:span><text:span text:style-name="Strong_20_Emphasis"><text:span text:style-name="T12">&lt;?, ?, ?, ?&gt;</text:span></text:span></text:p>
      <text:h text:style-name="P16" text:outline-level="3">Example 2 (Positive)</text:h>
      <text:p text:style-name="P31">Only Internet Usage differs.</text:p>
      <text:p text:style-name="P17"><text:span text:style-name="T11">S = </text:span><text:span text:style-name="Strong_20_Emphasis"><text:span text:style-name="T12">&lt;Young, High, ?, Mobile&gt;</text:span></text:span></text:p>
      <text:h text:style-name="P16" text:outline-level="3">Example 3 (Negative)</text:h>
      <text:p text:style-name="P31">Negative example:</text:p>
      <text:p text:style-name="P17"><text:span text:style-name="Strong_20_Emphasis"><text:span text:style-name="T12">&lt;Middle, Low, Frequent, Desktop&gt;</text:span></text:span></text:p>
      <text:p text:style-name="P49">Specialize G to exclude this example.</text:p>
      <text:p text:style-name="P49">Possible G:</text:p>
      <text:p text:style-name="P17"><text:span text:style-name="Strong_20_Emphasis"><text:span text:style-name="T12">&lt;Young, ?, ?, ?&gt;</text:span></text:span></text:p>
      <text:h text:style-name="P16" text:outline-level="3">Example 4 (Positive)</text:h>
      <text:p text:style-name="P31">Income differs.</text:p>
      <text:p text:style-name="P17"><text:span text:style-name="T11">S = </text:span><text:span text:style-name="Strong_20_Emphasis"><text:span text:style-name="T12">&lt;Young, ?, ?, Mobile&gt;</text:span></text:span></text:p>
      <text:h text:style-name="P16" text:outline-level="3">Example 5 (Negative)</text:h>
      <text:p text:style-name="P31">Already excluded because Age Group = Senior.</text:p>
      <text:p text:style-name="P49">No further change.</text:p>
      <text:h text:style-name="P16" text:outline-level="3">Final Boundaries</text:h>
      <text:p text:style-name="P17"><text:span text:style-name="Strong_20_Emphasis"><text:span text:style-name="T12">Specific Boundary (S)</text:span></text:span></text:p>
      <text:p text:style-name="P17"><text:span text:style-name="Strong_20_Emphasis"><text:span text:style-name="T12">&lt;Young, ?, ?, Mobile&gt;</text:span></text:span></text:p>
      <text:p text:style-name="P17"><text:span text:style-name="Strong_20_Emphasis"><text:span text:style-name="T12">General Boundary (G)</text:span></text:span></text:p>
      <text:p text:style-name="P17"><text:span text:style-name="Strong_20_Emphasis"><text:span text:style-name="T12">&lt;Young, ?, ?, ?&gt;</text:span></text:span></text:p>
      <text:h text:style-name="P16" text:outline-level="3">Version Space</text:h>
      <text:p text:style-name="P31">The version space contains all hypotheses between S and G that correctly classify the training data.</text:p>
      <text:p text:style-name="P27"/>
      <text:h text:style-name="P40" text:outline-level="1"><text:soft-page-break/>Q9. Candidate Elimination Algorithm (Healthy Lifestyle)</text:h>
      <text:h text:style-name="P16" text:outline-level="3">Initialization</text:h>
      <text:p text:style-name="P31">Specific Boundary:</text:p>
      <text:p text:style-name="P17"><text:span text:style-name="Strong_20_Emphasis"><text:span text:style-name="T12">S₀ = &lt;Ø, Ø, Ø, Ø&gt;</text:span></text:span></text:p>
      <text:p text:style-name="P49">General Boundary:</text:p>
      <text:p text:style-name="P17"><text:span text:style-name="Strong_20_Emphasis"><text:span text:style-name="T12">G₀ = &lt;?, ?, ?, ?&gt;</text:span></text:span></text:p>
      <text:h text:style-name="P16" text:outline-level="3">Example 1 (Positive)</text:h>
      <text:p text:style-name="P17"><text:span text:style-name="T11">S = </text:span><text:span text:style-name="Strong_20_Emphasis"><text:span text:style-name="T12">&lt;Balanced, Regular, Adequate, Low&gt;</text:span></text:span></text:p>
      <text:h text:style-name="P16" text:outline-level="3">Example 2 (Positive)</text:h>
      <text:p text:style-name="P31">Sleep differs.</text:p>
      <text:p text:style-name="P49">Stress differs.</text:p>
      <text:p text:style-name="P17"><text:span text:style-name="T11">S = </text:span><text:span text:style-name="Strong_20_Emphasis"><text:span text:style-name="T12">&lt;Balanced, Regular, ?, ?&gt;</text:span></text:span></text:p>
      <text:h text:style-name="P16" text:outline-level="3">Example 3 (Negative)</text:h>
      <text:p text:style-name="P31">Negative example:</text:p>
      <text:p text:style-name="P17"><text:span text:style-name="Strong_20_Emphasis"><text:span text:style-name="T12">&lt;Junk, None, Poor, High&gt;</text:span></text:span></text:p>
      <text:p text:style-name="P49">Specialize G to exclude the negative example.</text:p>
      <text:p text:style-name="P17"><text:span text:style-name="T11">G = </text:span><text:span text:style-name="Strong_20_Emphasis"><text:span text:style-name="T12">&lt;Balanced, ?, ?, ?&gt;</text:span></text:span></text:p>
      <text:h text:style-name="P16" text:outline-level="3">Example 4 (Positive)</text:h>
      <text:p text:style-name="P31">Exercise differs.</text:p>
      <text:p text:style-name="P17"><text:span text:style-name="T11">S = </text:span><text:span text:style-name="Strong_20_Emphasis"><text:span text:style-name="T12">&lt;Balanced, ?, ?, ?&gt;</text:span></text:span></text:p>
      <text:h text:style-name="P16" text:outline-level="3">Example 5 (Negative)</text:h>
      <text:p text:style-name="P31">Already rejected because Diet = Junk.</text:p>
      <text:p text:style-name="P49">No change.</text:p>
      <text:h text:style-name="P16" text:outline-level="3">Final Boundaries</text:h>
      <text:p text:style-name="P31">Specific Boundary:</text:p>
      <text:p text:style-name="P17"><text:span text:style-name="Strong_20_Emphasis"><text:span text:style-name="T12">&lt;Balanced, ?, ?, ?&gt;</text:span></text:span></text:p>
      <text:p text:style-name="P49"><text:soft-page-break/>General Boundary:</text:p>
      <text:p text:style-name="P17"><text:span text:style-name="Strong_20_Emphasis"><text:span text:style-name="T12">&lt;Balanced, ?, ?, ?&gt;</text:span></text:span></text:p>
      <text:h text:style-name="P16" text:outline-level="3">Conclusion</text:h>
      <text:p text:style-name="P17"><text:span text:style-name="T11">The algorithm concludes that a </text:span><text:span text:style-name="Strong_20_Emphasis"><text:span text:style-name="T12">Balanced Diet</text:span></text:span><text:span text:style-name="T11"> is the most important attribute for predicting a healthy lifestyle, while the remaining attributes may vary.</text:span></text:p>
      <text:p text:style-name="P27"/>
      <text:h text:style-name="P40" text:outline-level="1">Q10. Design a Machine Learning System for Health Analysis</text:h>
      <text:h text:style-name="P16" text:outline-level="3">Answer</text:h>
      <text:p text:style-name="P17"><text:span text:style-name="T11">A Machine Learning health analysis system predicts diseases such as </text:span><text:span text:style-name="Strong_20_Emphasis"><text:span text:style-name="T12">heart disease</text:span></text:span><text:span text:style-name="T11"> or </text:span><text:span text:style-name="Strong_20_Emphasis"><text:span text:style-name="T12">diabetes</text:span></text:span><text:span text:style-name="T11"> using patient information.</text:span></text:p>
      <text:h text:style-name="P16" text:outline-level="3">System Architecture</text:h>
      <text:section text:style-name="Sect1" text:name="Section19">
        <text:p text:style-name="P18"><text:bookmark text:name="code-block-viewer Copy 18"/><text:span text:style-name="Source_20_Text"><text:span text:style-name="T14">Patient Data</text:span></text:span></text:p>
        <text:p text:style-name="P19"><text:span text:style-name="Source_20_Text"><text:span text:style-name="T17">(Age, BP, Glucose, Lifestyle)</text:span></text:span></text:p>
        <text:p text:style-name="P19"><text:span text:style-name="Source_20_Text"><text:span text:style-name="T15"><text:s text:c="12"/>↓</text:span></text:span></text:p>
        <text:p text:style-name="P19"><text:span text:style-name="Source_20_Text"><text:span text:style-name="T17">Data Collection</text:span></text:span></text:p>
        <text:p text:style-name="P19"><text:span text:style-name="Source_20_Text"><text:span text:style-name="T15"><text:s text:c="12"/>↓</text:span></text:span></text:p>
        <text:p text:style-name="P19"><text:span text:style-name="Source_20_Text"><text:span text:style-name="T17">Data Preprocessing</text:span></text:span></text:p>
        <text:p text:style-name="P19"><text:span text:style-name="Source_20_Text"><text:span text:style-name="T15"><text:s text:c="12"/>↓</text:span></text:span></text:p>
        <text:p text:style-name="P19"><text:span text:style-name="Source_20_Text"><text:span text:style-name="T17">Feature Selection</text:span></text:span></text:p>
        <text:p text:style-name="P19"><text:span text:style-name="Source_20_Text"><text:span text:style-name="T15"><text:s text:c="12"/>↓</text:span></text:span></text:p>
        <text:p text:style-name="P19"><text:span text:style-name="Source_20_Text"><text:span text:style-name="T17">Model Training</text:span></text:span></text:p>
        <text:p text:style-name="P19"><text:span text:style-name="Source_20_Text"><text:span text:style-name="T15"><text:s text:c="12"/>↓</text:span></text:span></text:p>
        <text:p text:style-name="P19"><text:span text:style-name="Source_20_Text"><text:span text:style-name="T17">Prediction</text:span></text:span></text:p>
        <text:p text:style-name="P19"><text:span text:style-name="Source_20_Text"><text:span text:style-name="T15"><text:s text:c="12"/>↓</text:span></text:span></text:p>
        <text:p text:style-name="P19"><text:span text:style-name="Source_20_Text"><text:span text:style-name="T17">Doctor's Decision Support</text:span></text:span></text:p>
      </text:section>
      <text:h text:style-name="P16" text:outline-level="3">Suitable Algorithms</text:h>
      <text:p text:style-name="P17"><text:span text:style-name="Strong_20_Emphasis"><text:span text:style-name="T12">1. Logistic Regression</text:span></text:span></text:p>
      <text:list text:style-name="L26">
        <text:list-item>
          <text:p text:style-name="P56">Suitable for disease classification.</text:p>
        </text:list-item>
        <text:list-item>
          <text:p text:style-name="P56">Fast and easy to interpret.</text:p>
        </text:list-item>
      </text:list>
      <text:p text:style-name="P17"><text:span text:style-name="Strong_20_Emphasis"><text:span text:style-name="T12">2. Decision Tree</text:span></text:span></text:p>
      <text:list text:style-name="L27">
        <text:list-item>
          <text:p text:style-name="P57">Produces simple decision rules.</text:p>
        </text:list-item>
        <text:list-item>
          <text:p text:style-name="P57">Easy for doctors to understand.</text:p>
        </text:list-item>
      </text:list>
      <text:p text:style-name="P17"><text:soft-page-break/><text:span text:style-name="Strong_20_Emphasis"><text:span text:style-name="T12">3. Random Forest</text:span></text:span></text:p>
      <text:list text:style-name="L28">
        <text:list-item>
          <text:p text:style-name="P58">High prediction accuracy.</text:p>
        </text:list-item>
        <text:list-item>
          <text:p text:style-name="P58">Reduces overfitting.</text:p>
        </text:list-item>
        <text:list-item>
          <text:p text:style-name="P58">Handles large datasets effectively.</text:p>
        </text:list-item>
      </text:list>
      <text:h text:style-name="P16" text:outline-level="3">Data Preprocessing</text:h>
      <text:list text:style-name="L29">
        <text:list-item>
          <text:p text:style-name="P59">Remove missing values.</text:p>
        </text:list-item>
        <text:list-item>
          <text:p text:style-name="P59">Remove duplicate records.</text:p>
        </text:list-item>
        <text:list-item>
          <text:p text:style-name="P59">Normalize numerical data.</text:p>
        </text:list-item>
        <text:list-item>
          <text:p text:style-name="P59">Encode categorical variables.</text:p>
        </text:list-item>
        <text:list-item>
          <text:p text:style-name="P59">Split data into training and testing sets.</text:p>
        </text:list-item>
      </text:list>
      <text:h text:style-name="P16" text:outline-level="3">Feature Selection</text:h>
      <text:p text:style-name="P31">Important features include:</text:p>
      <text:list text:style-name="L30">
        <text:list-item>
          <text:p text:style-name="P60">Age</text:p>
        </text:list-item>
        <text:list-item>
          <text:p text:style-name="P60">Blood Pressure</text:p>
        </text:list-item>
        <text:list-item>
          <text:p text:style-name="P60">Blood Sugar (Glucose)</text:p>
        </text:list-item>
        <text:list-item>
          <text:p text:style-name="P60">Cholesterol</text:p>
        </text:list-item>
        <text:list-item>
          <text:p text:style-name="P60">BMI</text:p>
        </text:list-item>
        <text:list-item>
          <text:p text:style-name="P60">Smoking Habit</text:p>
        </text:list-item>
        <text:list-item>
          <text:p text:style-name="P60">Physical Activity</text:p>
        </text:list-item>
        <text:list-item>
          <text:p text:style-name="P60">Family History</text:p>
        </text:list-item>
      </text:list>
      <text:p text:style-name="P31">Feature selection reduces unnecessary attributes, improves accuracy, and decreases training time.</text:p>
      <text:h text:style-name="P16" text:outline-level="3">Model Training</text:h>
      <text:list text:style-name="L31">
        <text:list-item>
          <text:p text:style-name="P61">Split the dataset into training and testing sets.</text:p>
        </text:list-item>
        <text:list-item>
          <text:p text:style-name="P61">Train the selected algorithm.</text:p>
        </text:list-item>
        <text:list-item>
          <text:p text:style-name="P61">Validate the model using validation data.</text:p>
        </text:list-item>
        <text:list-item>
          <text:p text:style-name="P61">Evaluate performance using test data.</text:p>
        </text:list-item>
      </text:list>
      <text:h text:style-name="P16" text:outline-level="3">Evaluation Metrics</text:h>
      <text:list text:style-name="L32">
        <text:list-item>
          <text:p text:style-name="P62">Accuracy</text:p>
        </text:list-item>
        <text:list-item>
          <text:p text:style-name="P62">Precision</text:p>
        </text:list-item>
        <text:list-item>
          <text:p text:style-name="P62">Recall</text:p>
        </text:list-item>
        <text:list-item>
          <text:p text:style-name="P62">F1-Score</text:p>
        </text:list-item>
        <text:list-item>
          <text:p text:style-name="P62"><text:soft-page-break/>ROC-AUC</text:p>
        </text:list-item>
      </text:list>
      <text:h text:style-name="P16" text:outline-level="3">Advantages</text:h>
      <text:list text:style-name="L33">
        <text:list-item>
          <text:p text:style-name="P63">Early disease detection.</text:p>
        </text:list-item>
        <text:list-item>
          <text:p text:style-name="P63">Better treatment planning.</text:p>
        </text:list-item>
        <text:list-item>
          <text:p text:style-name="P63">Reduces diagnostic errors.</text:p>
        </text:list-item>
        <text:list-item>
          <text:p text:style-name="P63">Supports doctors in clinical decision-making.</text:p>
        </text:list-item>
        <text:list-item>
          <text:p text:style-name="P63">Improves patient care.</text:p>
        </text:list-item>
      </text:list>
      <text:h text:style-name="P16" text:outline-level="3">Conclusion</text:h>
      <text:p text:style-name="P17"><text:span text:style-name="T11">A health analysis system using </text:span><text:span text:style-name="Strong_20_Emphasis"><text:span text:style-name="T12">Random Forest or Logistic Regression</text:span></text:span><text:span text:style-name="T11">, combined with proper preprocessing and feature selection, provides accurate disease prediction and supports timely medical intervention</text:span></text:p>
      <text:h text:style-name="P15" text:outline-level="1">Q11. Explain the Architecture of a Typical Machine Learning Pipeline. Differentiate between Training Error and Generalization Error.</text:h>
      <text:h text:style-name="P64" text:outline-level="2">Answer</text:h>
      <text:p text:style-name="P17"><text:span text:style-name="T11">A </text:span><text:span text:style-name="Strong_20_Emphasis"><text:span text:style-name="T12">Machine Learning Pipeline</text:span></text:span><text:span text:style-name="T11"> is a sequence of steps used to build, train, evaluate, and deploy a machine learning model. It ensures that data flows systematically from collection to prediction.</text:span></text:p>
      <text:h text:style-name="P16" text:outline-level="3">Architecture of a Machine Learning Pipeline</text:h>
      <text:section text:style-name="Sect1" text:name="Section20">
        <text:p text:style-name="P18"><text:bookmark text:name="code-block-viewer Copy 19"/><text:span text:style-name="Source_20_Text"><text:span text:style-name="T14">Data Collection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Data Preprocessing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Feature Engineering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Model Selection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Model Training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Model Evaluation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Model Deployment</text:span></text:span></text:p>
        <text:p text:style-name="P19"><text:span text:style-name="Source_20_Text"><text:span text:style-name="T15"><text:s text:c="8"/>↓</text:span></text:span></text:p>
        <text:p text:style-name="P19"><text:span text:style-name="Source_20_Text"><text:span text:style-name="T17">Prediction</text:span></text:span></text:p>
      </text:section>
      <text:h text:style-name="P16" text:outline-level="3"><text:soft-page-break/>Stages of the Pipeline</text:h>
      <text:h text:style-name="P16" text:outline-level="3">1. Data Collection</text:h>
      <text:list text:style-name="L34">
        <text:list-item>
          <text:p text:style-name="P65">Data is collected from sensors, databases, websites, or IoT devices.</text:p>
        </text:list-item>
        <text:list-item>
          <text:p text:style-name="P65">Example: Collecting patient records for disease prediction.</text:p>
        </text:list-item>
      </text:list>
      <text:h text:style-name="P16" text:outline-level="3">2. Data Preprocessing</text:h>
      <text:list text:style-name="L35">
        <text:list-item>
          <text:p text:style-name="P66">Remove missing values.</text:p>
        </text:list-item>
        <text:list-item>
          <text:p text:style-name="P66">Remove duplicate records.</text:p>
        </text:list-item>
        <text:list-item>
          <text:p text:style-name="P66">Normalize numerical data.</text:p>
        </text:list-item>
        <text:list-item>
          <text:p text:style-name="P66">Encode categorical attributes.</text:p>
        </text:list-item>
      </text:list>
      <text:h text:style-name="P16" text:outline-level="3">3. Feature Engineering</text:h>
      <text:list text:style-name="L36">
        <text:list-item>
          <text:p text:style-name="P67">Select important features.</text:p>
        </text:list-item>
        <text:list-item>
          <text:p text:style-name="P67">Create new useful features.</text:p>
        </text:list-item>
        <text:list-item>
          <text:p text:style-name="P67">Reduce dimensionality using PCA if required.</text:p>
        </text:list-item>
      </text:list>
      <text:h text:style-name="P16" text:outline-level="3">4. Model Training</text:h>
      <text:list text:style-name="L37">
        <text:list-item>
          <text:p text:style-name="P68">Train the selected algorithm using training data.</text:p>
        </text:list-item>
        <text:list-item>
          <text:p text:style-name="P68">Common algorithms:</text:p>
          <text:list>
            <text:list-item>
              <text:p text:style-name="P68">Decision Tree</text:p>
            </text:list-item>
            <text:list-item>
              <text:p text:style-name="P68">Random Forest</text:p>
            </text:list-item>
            <text:list-item>
              <text:p text:style-name="P68">Naïve Bayes</text:p>
            </text:list-item>
            <text:list-item>
              <text:p text:style-name="P68">SVM</text:p>
            </text:list-item>
          </text:list>
        </text:list-item>
      </text:list>
      <text:h text:style-name="P16" text:outline-level="3">5. Model Evaluation</text:h>
      <text:p text:style-name="P31">Evaluate the model using:</text:p>
      <text:list text:style-name="L38">
        <text:list-item>
          <text:p text:style-name="P69">Accuracy</text:p>
        </text:list-item>
        <text:list-item>
          <text:p text:style-name="P69">Precision</text:p>
        </text:list-item>
        <text:list-item>
          <text:p text:style-name="P69">Recall</text:p>
        </text:list-item>
        <text:list-item>
          <text:p text:style-name="P69">F1-Score</text:p>
        </text:list-item>
      </text:list>
      <text:h text:style-name="P16" text:outline-level="3">6. Model Deployment</text:h>
      <text:list text:style-name="L39">
        <text:list-item>
          <text:p text:style-name="P70">Deploy the trained model to a website, mobile app, or cloud server.</text:p>
        </text:list-item>
        <text:list-item>
          <text:p text:style-name="P70">The model predicts outcomes for new data.</text:p>
        </text:list-item>
      </text:list>
      <text:p text:style-name="P27"><text:soft-page-break/></text:p>
      <text:h text:style-name="P71" text:outline-level="2">Difference between Training Error and Generalization Error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Training Error</text:p>
            </table:table-cell>
            <table:table-cell table:style-name="Table7.A1" office:value-type="string">
              <text:p text:style-name="P32">Generalization Error</text:p>
            </table:table-cell>
          </table:table-row>
        </table:table-header-rows>
        <table:table-row>
          <table:table-cell table:style-name="Table7.A2" office:value-type="string">
            <text:p text:style-name="P33">Error on training data</text:p>
          </table:table-cell>
          <table:table-cell table:style-name="Table7.A2" office:value-type="string">
            <text:p text:style-name="P33">Error on unseen test data</text:p>
          </table:table-cell>
        </table:table-row>
        <table:table-row>
          <table:table-cell table:style-name="Table7.A2" office:value-type="string">
            <text:p text:style-name="P33">Usually low</text:p>
          </table:table-cell>
          <table:table-cell table:style-name="Table7.A2" office:value-type="string">
            <text:p text:style-name="P33">Measures real-world performance</text:p>
          </table:table-cell>
        </table:table-row>
        <table:table-row>
          <table:table-cell table:style-name="Table7.A2" office:value-type="string">
            <text:p text:style-name="P33">Does not indicate actual performance</text:p>
          </table:table-cell>
          <table:table-cell table:style-name="Table7.A2" office:value-type="string">
            <text:p text:style-name="P33">Indicates model's ability to predict new data</text:p>
          </table:table-cell>
        </table:table-row>
        <table:table-row>
          <table:table-cell table:style-name="Table7.A5" office:value-type="string">
            <text:p text:style-name="P33">Example: 98% accuracy on training data</text:p>
          </table:table-cell>
          <table:table-cell table:style-name="Table7.A5" office:value-type="string">
            <text:p text:style-name="P34">Example: 90% accuracy on test data</text:p>
          </table:table-cell>
        </table:table-row>
      </table:table>
      <text:h text:style-name="P16" text:outline-level="3">Example</text:h>
      <text:p text:style-name="P31">A spam detection model achieves:</text:p>
      <text:list text:style-name="L40">
        <text:list-item>
          <text:p text:style-name="P72"><text:span text:style-name="T11">Training Accuracy = </text:span><text:span text:style-name="Strong_20_Emphasis"><text:span text:style-name="T12">99%</text:span></text:span></text:p>
        </text:list-item>
        <text:list-item>
          <text:p text:style-name="P72"><text:span text:style-name="T11">Testing Accuracy = </text:span><text:span text:style-name="Strong_20_Emphasis"><text:span text:style-name="T12">91%</text:span></text:span></text:p>
        </text:list-item>
      </text:list>
      <text:p text:style-name="P17"><text:span text:style-name="T11">The difference indicates </text:span><text:span text:style-name="Strong_20_Emphasis"><text:span text:style-name="T12">generalization error</text:span></text:span><text:span text:style-name="T11">.</text:span></text:p>
      <text:h text:style-name="P16" text:outline-level="3">Conclusion</text:h>
      <text:p text:style-name="P31">A good machine learning pipeline produces reliable models. Low training error and low generalization error indicate good performance.</text:p>
      <text:p text:style-name="P27"/>
      <text:h text:style-name="P40" text:outline-level="1">Q12. Design a Machine Learning Model for Spam Email Classification</text:h>
      <text:h text:style-name="P64" text:outline-level="2">Answer</text:h>
      <text:p text:style-name="P17"><text:span text:style-name="T11">Spam email classification identifies whether an email is </text:span><text:span text:style-name="Strong_20_Emphasis"><text:span text:style-name="T12">Spam</text:span></text:span><text:span text:style-name="T11"> or </text:span><text:span text:style-name="Strong_20_Emphasis"><text:span text:style-name="T12">Not Spam</text:span></text:span><text:span text:style-name="T11"> using labelled data.</text:span></text:p>
      <text:h text:style-name="P16" text:outline-level="3">System Architecture</text:h>
      <text:section text:style-name="Sect1" text:name="Section21">
        <text:p text:style-name="P18"><text:bookmark text:name="code-block-viewer Copy 20"/><text:span text:style-name="Source_20_Text"><text:span text:style-name="T14">Email Dataset</text:span></text:span></text:p>
        <text:p text:style-name="P19"><text:span text:style-name="Source_20_Text"><text:span text:style-name="T15"><text:s text:c="6"/>↓</text:span></text:span></text:p>
        <text:p text:style-name="P19"><text:span text:style-name="Source_20_Text"><text:span text:style-name="T17">Preprocessing</text:span></text:span></text:p>
        <text:p text:style-name="P19"><text:span text:style-name="Source_20_Text"><text:span text:style-name="T15"><text:s text:c="6"/>↓</text:span></text:span></text:p>
        <text:p text:style-name="P19"><text:span text:style-name="Source_20_Text"><text:span text:style-name="T17">Feature Extraction</text:span></text:span></text:p>
        <text:p text:style-name="P19"><text:span text:style-name="Source_20_Text"><text:span text:style-name="T15"><text:s text:c="6"/>↓</text:span></text:span></text:p>
        <text:p text:style-name="P19"><text:span text:style-name="Source_20_Text"><text:span text:style-name="T17">Model Training</text:span></text:span></text:p>
        <text:p text:style-name="P19"><text:span text:style-name="Source_20_Text"><text:span text:style-name="T15"><text:s text:c="6"/>↓</text:span></text:span></text:p>
        <text:p text:style-name="P19"><text:span text:style-name="Source_20_Text"><text:span text:style-name="T17">Prediction</text:span></text:span></text:p>
        <text:p text:style-name="P19"><text:soft-page-break/><text:span text:style-name="Source_20_Text"><text:span text:style-name="T15"><text:s text:c="6"/>↓</text:span></text:span></text:p>
        <text:p text:style-name="P19"><text:span text:style-name="Source_20_Text"><text:span text:style-name="T17">Spam / Not Spam</text:span></text:span></text:p>
      </text:section>
      <text:p text:style-name="P27"/>
      <text:h text:style-name="P71" text:outline-level="2">(a) Choice of Algorithm</text:h>
      <text:h text:style-name="P16" text:outline-level="3">Naïve Bayes</text:h>
      <text:p text:style-name="P31">Reasons:</text:p>
      <text:list text:style-name="L41">
        <text:list-item>
          <text:p text:style-name="P73">Fast training.</text:p>
        </text:list-item>
        <text:list-item>
          <text:p text:style-name="P73">Works well with text data.</text:p>
        </text:list-item>
        <text:list-item>
          <text:p text:style-name="P73">High accuracy.</text:p>
        </text:list-item>
        <text:list-item>
          <text:p text:style-name="P73">Uses probability for classification.</text:p>
        </text:list-item>
      </text:list>
      <text:p text:style-name="P31">Other suitable algorithms:</text:p>
      <text:list text:style-name="L42">
        <text:list-item>
          <text:p text:style-name="P74">Support Vector Machine (SVM)</text:p>
        </text:list-item>
        <text:list-item>
          <text:p text:style-name="P74">Logistic Regression</text:p>
        </text:list-item>
      </text:list>
      <text:p text:style-name="P27"/>
      <text:h text:style-name="P71" text:outline-level="2">(b) Preprocessing Steps</text:h>
      <text:h text:style-name="P16" text:outline-level="3">1. Tokenization</text:h>
      <text:p text:style-name="P31">Split the email into individual words.</text:p>
      <text:p text:style-name="P49">Example:</text:p>
      <text:section text:style-name="Sect1" text:name="Section22">
        <text:p text:style-name="P18"><text:bookmark text:name="code-block-viewer Copy 21"/><text:span text:style-name="Source_20_Text"><text:span text:style-name="T14">"Win a free phone"</text:span></text:span></text:p>
        <text:p text:style-name="P19"><text:span text:style-name="Source_20_Text"><text:span text:style-name="T15">↓</text:span></text:span></text:p>
        <text:p text:style-name="P75"/>
        <text:p text:style-name="P19"><text:span text:style-name="Source_20_Text"><text:span text:style-name="T17">Win | a | free | phone</text:span></text:span></text:p>
      </text:section>
      <text:h text:style-name="P16" text:outline-level="3">2. Stop-word Removal</text:h>
      <text:p text:style-name="P31">Remove common words such as:</text:p>
      <text:list text:style-name="L43">
        <text:list-item>
          <text:p text:style-name="P76">is</text:p>
        </text:list-item>
        <text:list-item>
          <text:p text:style-name="P76">the</text:p>
        </text:list-item>
        <text:list-item>
          <text:p text:style-name="P76">a</text:p>
        </text:list-item>
        <text:list-item>
          <text:p text:style-name="P76">an</text:p>
        </text:list-item>
        <text:list-item>
          <text:p text:style-name="P76">of</text:p>
        </text:list-item>
      </text:list>
      <text:p text:style-name="P31">This reduces unnecessary information.</text:p>
      <text:h text:style-name="P16" text:outline-level="3"><text:soft-page-break/>3. Stemming/Lemmatization</text:h>
      <text:p text:style-name="P31">Convert words to their root form.</text:p>
      <text:p text:style-name="P49">Example:</text:p>
      <text:list text:style-name="L44">
        <text:list-item>
          <text:p text:style-name="P77">Playing → Play</text:p>
        </text:list-item>
        <text:list-item>
          <text:p text:style-name="P77">Running → Run</text:p>
        </text:list-item>
      </text:list>
      <text:h text:style-name="P16" text:outline-level="3">4. Vectorization</text:h>
      <text:p text:style-name="P31">Convert text into numerical values using:</text:p>
      <text:list text:style-name="L45">
        <text:list-item>
          <text:p text:style-name="P78">Bag of Words</text:p>
        </text:list-item>
        <text:list-item>
          <text:p text:style-name="P78">TF-IDF</text:p>
        </text:list-item>
      </text:list>
      <text:p text:style-name="P31">This allows machine learning algorithms to process text.</text:p>
      <text:p text:style-name="P27"/>
      <text:h text:style-name="P71" text:outline-level="2">(c) Evaluation Metrics</text:h>
      <text:h text:style-name="P16" text:outline-level="3">Accuracy</text:h>
      <text:p text:style-name="P31">Percentage of correctly classified emails.</text:p>
      <text:h text:style-name="P16" text:outline-level="3">Precision</text:h>
      <text:p text:style-name="P31">Measures how many emails predicted as spam are actually spam.</text:p>
      <text:h text:style-name="P16" text:outline-level="3">Recall</text:h>
      <text:p text:style-name="P31">Measures how many actual spam emails are detected.</text:p>
      <text:h text:style-name="P16" text:outline-level="3">F1-Score</text:h>
      <text:p text:style-name="P31">Harmonic mean of Precision and Recall.</text:p>
      <text:p text:style-name="P79"><draw:frame draw:style-name="fr1" draw:name="Frame1" text:anchor-type="char" svg:width="0.0161in" draw:z-index="0"><draw:text-box fo:min-height="0.0161in"><text:p text:style-name="P80">F1=2PRP+R</text:p></draw:text-box></draw:frame><text:span text:style-name="T19">F</text:span>1=<text:span text:style-name="T19">P</text:span>+<text:span text:style-name="T19">R</text:span>2<text:span text:style-name="T19">PR</text:span>​</text:p>
      <text:p text:style-name="P27"/>
      <text:h text:style-name="P71" text:outline-level="2">Advantages</text:h>
      <text:list text:style-name="L46">
        <text:list-item>
          <text:p text:style-name="P81">Filters unwanted emails.</text:p>
        </text:list-item>
        <text:list-item>
          <text:p text:style-name="P81">Saves user time.</text:p>
        </text:list-item>
        <text:list-item>
          <text:p text:style-name="P81">Improves email security.</text:p>
        </text:list-item>
        <text:list-item>
          <text:p text:style-name="P81">Reduces phishing attacks.</text:p>
        </text:list-item>
      </text:list>
      <text:h text:style-name="P16" text:outline-level="3"><text:soft-page-break/>Conclusion</text:h>
      <text:p text:style-name="P31">Naïve Bayes with proper preprocessing provides an efficient and accurate spam email classification system.</text:p>
      <text:p text:style-name="P27"/>
      <text:h text:style-name="P40" text:outline-level="1">Q13. Candidate Elimination Algorithm (EnjoySport Dataset)</text:h>
      <text:h text:style-name="P64" text:outline-level="2">(a) Initialization of S and G</text:h>
      <text:p text:style-name="P31">The Candidate Elimination Algorithm maintains two boundaries:</text:p>
      <text:h text:style-name="P16" text:outline-level="3">Specific Boundary (S)</text:h>
      <text:p text:style-name="P31">Most specific hypothesis.</text:p>
      <text:section text:style-name="Sect1" text:name="Section23">
        <text:p text:style-name="P18"><text:bookmark text:name="code-block-viewer Copy 22"/><text:span text:style-name="Source_20_Text"><text:span text:style-name="T13">S = &lt;Ø, Ø, Ø, Ø, Ø, Ø&gt;</text:span></text:span></text:p>
      </text:section>
      <text:h text:style-name="P16" text:outline-level="3">General Boundary (G)</text:h>
      <text:p text:style-name="P31">Most general hypothesis.</text:p>
      <text:section text:style-name="Sect1" text:name="Section24">
        <text:p text:style-name="P18"><text:bookmark text:name="code-block-viewer Copy 23"/><text:span text:style-name="Source_20_Text"><text:span text:style-name="T13">G = &lt;?, ?, ?, ?, ?, ?&gt;</text:span></text:span></text:p>
      </text:section>
      <text:p text:style-name="P27"/>
      <text:h text:style-name="P71" text:outline-level="2">(b) Updating S and G</text:h>
      <text:h text:style-name="P16" text:outline-level="3">Step 1</text:h>
      <text:p text:style-name="P31">For the first positive example:</text:p>
      <text:p text:style-name="P49">Update S to match the example.</text:p>
      <text:p text:style-name="P49">Example:</text:p>
      <text:section text:style-name="Sect1" text:name="Section25">
        <text:p text:style-name="P18"><text:bookmark text:name="code-block-viewer Copy 24"/><text:span text:style-name="Source_20_Text"><text:span text:style-name="T14">S =</text:span></text:span></text:p>
        <text:p text:style-name="P19"><text:span text:style-name="Source_20_Text"><text:span text:style-name="T17">&lt;Sunny,</text:span></text:span></text:p>
        <text:p text:style-name="P19"><text:span text:style-name="Source_20_Text"><text:span text:style-name="T15"><text:s/></text:span></text:span><text:span text:style-name="Source_20_Text"><text:span text:style-name="T17">Warm,</text:span></text:span></text:p>
        <text:p text:style-name="P19"><text:span text:style-name="Source_20_Text"><text:span text:style-name="T15"><text:s/></text:span></text:span><text:span text:style-name="Source_20_Text"><text:span text:style-name="T17">Normal,</text:span></text:span></text:p>
        <text:p text:style-name="P19"><text:span text:style-name="Source_20_Text"><text:span text:style-name="T15"><text:s/></text:span></text:span><text:span text:style-name="Source_20_Text"><text:span text:style-name="T17">Strong,</text:span></text:span></text:p>
        <text:p text:style-name="P19"><text:span text:style-name="Source_20_Text"><text:span text:style-name="T15"><text:s/></text:span></text:span><text:span text:style-name="Source_20_Text"><text:span text:style-name="T17">Warm,</text:span></text:span></text:p>
        <text:p text:style-name="P19"><text:span text:style-name="Source_20_Text"><text:span text:style-name="T15"><text:s/></text:span></text:span><text:span text:style-name="Source_20_Text"><text:span text:style-name="T17">Same&gt;</text:span></text:span></text:p>
      </text:section>
      <text:p text:style-name="P31">G remains unchanged.</text:p>
      <text:p text:style-name="P27"/>
      <text:h text:style-name="P28" text:outline-level="3"><text:soft-page-break/>Step 2</text:h>
      <text:p text:style-name="P31">For another positive example:</text:p>
      <text:p text:style-name="P49">Generalize S wherever attribute values differ.</text:p>
      <text:p text:style-name="P49">Example:</text:p>
      <text:section text:style-name="Sect1" text:name="Section26">
        <text:p text:style-name="P18"><text:bookmark text:name="code-block-viewer Copy 25"/><text:span text:style-name="Source_20_Text"><text:span text:style-name="T13">S =</text:span></text:span></text:p>
        <text:p text:style-name="P19"><text:span text:style-name="Source_20_Text"><text:span text:style-name="T18">&lt;Sunny,</text:span></text:span></text:p>
        <text:p text:style-name="P19"><text:span text:style-name="Source_20_Text"><text:span text:style-name="T20"><text:s/></text:span></text:span><text:span text:style-name="Source_20_Text"><text:span text:style-name="T18">Warm,</text:span></text:span></text:p>
        <text:p text:style-name="P19"><text:span text:style-name="Source_20_Text"><text:span text:style-name="T20"><text:s/></text:span></text:span><text:span text:style-name="Source_20_Text"><text:span text:style-name="T18">?,</text:span></text:span></text:p>
        <text:p text:style-name="P19"><text:span text:style-name="Source_20_Text"><text:span text:style-name="T20"><text:s/></text:span></text:span><text:span text:style-name="Source_20_Text"><text:span text:style-name="T18">Strong,</text:span></text:span></text:p>
        <text:p text:style-name="P19"><text:span text:style-name="Source_20_Text"><text:span text:style-name="T20"><text:s/></text:span></text:span><text:span text:style-name="Source_20_Text"><text:span text:style-name="T18">?,</text:span></text:span></text:p>
        <text:p text:style-name="P19"><text:span text:style-name="Source_20_Text"><text:span text:style-name="T20"><text:s/></text:span></text:span><text:span text:style-name="Source_20_Text"><text:span text:style-name="T18">Same&gt;</text:span></text:span></text:p>
      </text:section>
      <text:p text:style-name="P27"/>
      <text:h text:style-name="P28" text:outline-level="3">Step 3</text:h>
      <text:p text:style-name="P31">For a negative example:</text:p>
      <text:p text:style-name="P49">Specialize G to exclude the negative example while remaining consistent with S.</text:p>
      <text:p text:style-name="P49">Example:</text:p>
      <text:section text:style-name="Sect1" text:name="Section27">
        <text:p text:style-name="P18"><text:bookmark text:name="code-block-viewer Copy 26"/><text:span text:style-name="Source_20_Text"><text:span text:style-name="T13">G =</text:span></text:span></text:p>
        <text:p text:style-name="P19"><text:span text:style-name="Source_20_Text"><text:span text:style-name="T18">&lt;Sunny,</text:span></text:span></text:p>
        <text:p text:style-name="P19"><text:span text:style-name="Source_20_Text"><text:span text:style-name="T20"><text:s/></text:span></text:span><text:span text:style-name="Source_20_Text"><text:span text:style-name="T18">?,</text:span></text:span></text:p>
        <text:p text:style-name="P19"><text:span text:style-name="Source_20_Text"><text:span text:style-name="T20"><text:s/></text:span></text:span><text:span text:style-name="Source_20_Text"><text:span text:style-name="T18">?,</text:span></text:span></text:p>
        <text:p text:style-name="P19"><text:span text:style-name="Source_20_Text"><text:span text:style-name="T20"><text:s/></text:span></text:span><text:span text:style-name="Source_20_Text"><text:span text:style-name="T18">?,</text:span></text:span></text:p>
        <text:p text:style-name="P19"><text:span text:style-name="Source_20_Text"><text:span text:style-name="T20"><text:s/></text:span></text:span><text:span text:style-name="Source_20_Text"><text:span text:style-name="T18">?,</text:span></text:span></text:p>
        <text:p text:style-name="P19"><text:span text:style-name="Source_20_Text"><text:span text:style-name="T20"><text:s/></text:span></text:span><text:span text:style-name="Source_20_Text"><text:span text:style-name="T18">?&gt;</text:span></text:span></text:p>
      </text:section>
      <text:p text:style-name="P27"/>
      <text:h text:style-name="P28" text:outline-level="3">Final Version Space</text:h>
      <text:p text:style-name="P17"><text:span text:style-name="T11">The version space consists of all hypotheses between the final </text:span><text:span text:style-name="Strong_20_Emphasis"><text:span text:style-name="T12">Specific Boundary (S)</text:span></text:span><text:span text:style-name="T11"> and </text:span><text:span text:style-name="Strong_20_Emphasis"><text:span text:style-name="T12">General Boundary (G)</text:span></text:span><text:span text:style-name="T11">.</text:span></text:p>
      <text:p text:style-name="P27"/>
      <text:h text:style-name="P71" text:outline-level="2">(c) Comparison between Candidate Elimination and Find-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32">Find-S</text:p>
            </table:table-cell>
            <table:table-cell table:style-name="Table8.A1" office:value-type="string">
              <text:p text:style-name="P32">Candidate Elimination</text:p>
            </table:table-cell>
          </table:table-row>
        </table:table-header-rows>
        <table:table-row>
          <table:table-cell table:style-name="Table8.A2" office:value-type="string">
            <text:p text:style-name="P33">Uses only positive examples</text:p>
          </table:table-cell>
          <table:table-cell table:style-name="Table8.A2" office:value-type="string">
            <text:p text:style-name="P33">Uses both positive and negative examples</text:p>
          </table:table-cell>
        </table:table-row>
        <text:soft-page-break/>
        <table:table-row>
          <table:table-cell table:style-name="Table8.A2" office:value-type="string">
            <text:p text:style-name="P33">Finds one maximally specific hypothesis</text:p>
          </table:table-cell>
          <table:table-cell table:style-name="Table8.A2" office:value-type="string">
            <text:p text:style-name="P33">Finds all consistent hypotheses</text:p>
          </table:table-cell>
        </table:table-row>
        <table:table-row>
          <table:table-cell table:style-name="Table8.A2" office:value-type="string">
            <text:p text:style-name="P33">Simpler algorithm</text:p>
          </table:table-cell>
          <table:table-cell table:style-name="Table8.A2" office:value-type="string">
            <text:p text:style-name="P33">More comprehensive algorithm</text:p>
          </table:table-cell>
        </table:table-row>
        <table:table-row>
          <table:table-cell table:style-name="Table8.A2" office:value-type="string">
            <text:p text:style-name="P33">Does not maintain version space</text:p>
          </table:table-cell>
          <table:table-cell table:style-name="Table8.A2" office:value-type="string">
            <text:p text:style-name="P33">Maintains version space (S and G)</text:p>
          </table:table-cell>
        </table:table-row>
        <table:table-row>
          <table:table-cell table:style-name="Table8.A6" office:value-type="string">
            <text:p text:style-name="P33">Less accurate for complex datasets</text:p>
          </table:table-cell>
          <table:table-cell table:style-name="Table8.A6" office:value-type="string">
            <text:p text:style-name="P34">Better learning capability</text:p>
          </table:table-cell>
        </table:table-row>
      </table:table>
      <text:h text:style-name="P16" text:outline-level="3">Conclusion</text:h>
      <text:p text:style-name="P31">Candidate Elimination is more powerful because it maintains both the most specific and most general hypotheses.</text:p>
      <text:p text:style-name="P27"/>
      <text:h text:style-name="P40" text:outline-level="1">Q14. Machine Learning System for House Price Prediction</text:h>
      <text:h text:style-name="P64" text:outline-level="2">Answer</text:h>
      <text:p text:style-name="P31">House price prediction estimates the selling price of a house using features such as location, size, number of rooms, and amenities.</text:p>
      <text:h text:style-name="P16" text:outline-level="3">System Architecture</text:h>
      <text:section text:style-name="Sect1" text:name="Section28">
        <text:p text:style-name="P18"><text:bookmark text:name="code-block-viewer Copy 27"/><text:span text:style-name="Source_20_Text"><text:span text:style-name="T14">House Data</text:span></text:span></text:p>
        <text:p text:style-name="P19"><text:span text:style-name="Source_20_Text"><text:span text:style-name="T17">(Location, Size, Rooms)</text:span></text:span></text:p>
        <text:p text:style-name="P19"><text:span text:style-name="Source_20_Text"><text:span text:style-name="T15"><text:s text:c="11"/>↓</text:span></text:span></text:p>
        <text:p text:style-name="P19"><text:span text:style-name="Source_20_Text"><text:span text:style-name="T17">Preprocessing</text:span></text:span></text:p>
        <text:p text:style-name="P19"><text:span text:style-name="Source_20_Text"><text:span text:style-name="T15"><text:s text:c="11"/>↓</text:span></text:span></text:p>
        <text:p text:style-name="P19"><text:span text:style-name="Source_20_Text"><text:span text:style-name="T17">Feature Selection</text:span></text:span></text:p>
        <text:p text:style-name="P19"><text:span text:style-name="Source_20_Text"><text:span text:style-name="T15"><text:s text:c="11"/>↓</text:span></text:span></text:p>
        <text:p text:style-name="P19"><text:span text:style-name="Source_20_Text"><text:span text:style-name="T17">Regression Model</text:span></text:span></text:p>
        <text:p text:style-name="P19"><text:span text:style-name="Source_20_Text"><text:span text:style-name="T15"><text:s text:c="11"/>↓</text:span></text:span></text:p>
        <text:p text:style-name="P19"><text:span text:style-name="Source_20_Text"><text:span text:style-name="T17">Price Prediction</text:span></text:span></text:p>
      </text:section>
      <text:p text:style-name="P27"/>
      <text:h text:style-name="P71" text:outline-level="2">(a) Choice of Regression Model</text:h>
      <text:h text:style-name="P16" text:outline-level="3">Linear Regression</text:h>
      <text:p text:style-name="P31">Suitable because:</text:p>
      <text:list text:style-name="L47">
        <text:list-item>
          <text:p text:style-name="P82">Simple to implement.</text:p>
        </text:list-item>
        <text:list-item>
          <text:p text:style-name="P82">Predicts continuous values.</text:p>
        </text:list-item>
        <text:list-item>
          <text:p text:style-name="P82"><text:soft-page-break/>Easy to interpret.</text:p>
        </text:list-item>
      </text:list>
      <text:h text:style-name="P16" text:outline-level="3">Decision Tree Regression</text:h>
      <text:list text:style-name="L48">
        <text:list-item>
          <text:p text:style-name="P83">Handles nonlinear relationships.</text:p>
        </text:list-item>
        <text:list-item>
          <text:p text:style-name="P83">Easy to visualize.</text:p>
        </text:list-item>
      </text:list>
      <text:h text:style-name="P16" text:outline-level="3">Random Forest Regression</text:h>
      <text:list text:style-name="L49">
        <text:list-item>
          <text:p text:style-name="P84">High prediction accuracy.</text:p>
        </text:list-item>
        <text:list-item>
          <text:p text:style-name="P84">Handles complex datasets.</text:p>
        </text:list-item>
        <text:list-item>
          <text:p text:style-name="P84">Reduces overfitting.</text:p>
        </text:list-item>
      </text:list>
      <text:p text:style-name="P31">Random Forest is generally preferred because it provides better performance.</text:p>
      <text:p text:style-name="P27"/>
      <text:h text:style-name="P71" text:outline-level="2">(b) Feature Scaling and Missing Data</text:h>
      <text:h text:style-name="P16" text:outline-level="3">Feature Scaling</text:h>
      <text:p text:style-name="P31">Scaling converts features into the same range.</text:p>
      <text:p text:style-name="P49">Methods:</text:p>
      <text:list text:style-name="L50">
        <text:list-item>
          <text:p text:style-name="P85">Min-Max Normalization</text:p>
        </text:list-item>
        <text:list-item>
          <text:p text:style-name="P85">Standardization</text:p>
        </text:list-item>
      </text:list>
      <text:p text:style-name="P31">Benefits:</text:p>
      <text:list text:style-name="L51">
        <text:list-item>
          <text:p text:style-name="P86">Faster training.</text:p>
        </text:list-item>
        <text:list-item>
          <text:p text:style-name="P86">Better model performance.</text:p>
        </text:list-item>
      </text:list>
      <text:h text:style-name="P16" text:outline-level="3">Handling Missing Data</text:h>
      <text:p text:style-name="P31">Methods:</text:p>
      <text:list text:style-name="L52">
        <text:list-item>
          <text:p text:style-name="P87">Remove incomplete records.</text:p>
        </text:list-item>
        <text:list-item>
          <text:p text:style-name="P87">Replace missing values using:</text:p>
          <text:list>
            <text:list-item>
              <text:p text:style-name="P87">Mean</text:p>
            </text:list-item>
            <text:list-item>
              <text:p text:style-name="P87">Median</text:p>
            </text:list-item>
            <text:list-item>
              <text:p text:style-name="P87">Mode</text:p>
            </text:list-item>
          </text:list>
        </text:list-item>
      </text:list>
      <text:p text:style-name="P27"/>
      <text:h text:style-name="P71" text:outline-level="2"><text:soft-page-break/>(c) Detecting and Avoiding Overfitting</text:h>
      <text:h text:style-name="P16" text:outline-level="3">Detecting Overfitting</text:h>
      <text:p text:style-name="P31">Symptoms:</text:p>
      <text:list text:style-name="L53">
        <text:list-item>
          <text:p text:style-name="P88">Very high training accuracy.</text:p>
        </text:list-item>
        <text:list-item>
          <text:p text:style-name="P88">Low testing accuracy.</text:p>
        </text:list-item>
      </text:list>
      <text:h text:style-name="P16" text:outline-level="3">Avoiding Overfitting</text:h>
      <text:list text:style-name="L54">
        <text:list-item>
          <text:p text:style-name="P89">Cross-validation.</text:p>
        </text:list-item>
        <text:list-item>
          <text:p text:style-name="P89">Feature selection.</text:p>
        </text:list-item>
        <text:list-item>
          <text:p text:style-name="P89">Increase training data.</text:p>
        </text:list-item>
        <text:list-item>
          <text:p text:style-name="P89">Regularization.</text:p>
        </text:list-item>
        <text:list-item>
          <text:p text:style-name="P89">Random Forest.</text:p>
        </text:list-item>
        <text:list-item>
          <text:p text:style-name="P89">Pruning (Decision Trees).</text:p>
        </text:list-item>
      </text:list>
      <text:p text:style-name="P27"/>
      <text:h text:style-name="P71" text:outline-level="2">Conclusion</text:h>
      <text:p text:style-name="P31">Random Forest Regression combined with proper preprocessing, feature scaling, and overfitting control provides accurate house price prediction.</text:p>
      <text:p text:style-name="P27"/>
      <text:h text:style-name="P40" text:outline-level="1">Q15. Explain Clustering in Unsupervised Learning</text:h>
      <text:h text:style-name="P64" text:outline-level="2">Answer</text:h>
      <text:p text:style-name="P17"><text:span text:style-name="T11">Clustering is an </text:span><text:span text:style-name="Strong_20_Emphasis"><text:span text:style-name="T12">unsupervised learning</text:span></text:span><text:span text:style-name="T11"> technique that groups similar data points into clusters without using labelled data.</text:span></text:p>
      <text:p text:style-name="P49">Applications:</text:p>
      <text:list text:style-name="L55">
        <text:list-item>
          <text:p text:style-name="P90">Customer segmentation</text:p>
        </text:list-item>
        <text:list-item>
          <text:p text:style-name="P90">Image segmentation</text:p>
        </text:list-item>
        <text:list-item>
          <text:p text:style-name="P90">Document clustering</text:p>
        </text:list-item>
        <text:list-item>
          <text:p text:style-name="P90">Market analysis</text:p>
        </text:list-item>
      </text:list>
      <text:p text:style-name="P27"/>
      <text:h text:style-name="P71" text:outline-level="2">(a) Working of K-Means Algorithm</text:h>
      <text:h text:style-name="P16" text:outline-level="3">Steps</text:h>
      <text:p text:style-name="P17"><text:span text:style-name="Strong_20_Emphasis"><text:span text:style-name="T12">Step 1:</text:span></text:span><text:span text:style-name="T11"> Choose the number of clusters (</text:span><text:span text:style-name="Strong_20_Emphasis"><text:span text:style-name="T12">K</text:span></text:span><text:span text:style-name="T11">).</text:span></text:p>
      <text:p text:style-name="P17"><text:soft-page-break/><text:span text:style-name="Strong_20_Emphasis"><text:span text:style-name="T12">Step 2:</text:span></text:span><text:span text:style-name="T11"> Select K initial centroids randomly.</text:span></text:p>
      <text:p text:style-name="P17"><text:span text:style-name="Strong_20_Emphasis"><text:span text:style-name="T12">Step 3:</text:span></text:span><text:span text:style-name="T11"> Assign each data point to the nearest centroid.</text:span></text:p>
      <text:p text:style-name="P17"><text:span text:style-name="Strong_20_Emphasis"><text:span text:style-name="T12">Step 4:</text:span></text:span><text:span text:style-name="T11"> Calculate the new centroid of each cluster.</text:span></text:p>
      <text:p text:style-name="P17"><text:span text:style-name="Strong_20_Emphasis"><text:span text:style-name="T12">Step 5:</text:span></text:span><text:span text:style-name="T11"> Repeat Steps 3 and 4 until the centroids no longer change.</text:span></text:p>
      <text:h text:style-name="P16" text:outline-level="3">Example</text:h>
      <text:p text:style-name="P31">Suppose we have student marks:</text:p>
      <text:section text:style-name="Sect1" text:name="Section29">
        <text:p text:style-name="P18"><text:bookmark text:name="code-block-viewer Copy 28"/><text:span text:style-name="Source_20_Text"><text:span text:style-name="T13">20, 25, 30, 80, 85, 90</text:span></text:span></text:p>
      </text:section>
      <text:p text:style-name="P17"><text:span text:style-name="T11">Choose </text:span><text:span text:style-name="Strong_20_Emphasis"><text:span text:style-name="T12">K = 2</text:span></text:span></text:p>
      <text:p text:style-name="P49">Initial centroids:</text:p>
      <text:list text:style-name="L56">
        <text:list-item>
          <text:p text:style-name="P91">C₁ = 25</text:p>
        </text:list-item>
        <text:list-item>
          <text:p text:style-name="P91">C₂ = 85</text:p>
        </text:list-item>
      </text:list>
      <text:p text:style-name="P31">Cluster Assignment:</text:p>
      <text:p text:style-name="P49">Cluster 1:</text:p>
      <text:section text:style-name="Sect1" text:name="Section30">
        <text:p text:style-name="P18"><text:bookmark text:name="code-block-viewer Copy 29"/><text:span text:style-name="Source_20_Text"><text:span text:style-name="T13">20, 25, 30</text:span></text:span></text:p>
      </text:section>
      <text:p text:style-name="P31">Cluster 2:</text:p>
      <text:section text:style-name="Sect1" text:name="Section31">
        <text:p text:style-name="P18"><text:bookmark text:name="code-block-viewer Copy 30"/><text:span text:style-name="Source_20_Text"><text:span text:style-name="T13">80, 85, 90</text:span></text:span></text:p>
      </text:section>
      <text:p text:style-name="P31">New Centroids:</text:p>
      <text:list text:style-name="L57">
        <text:list-item>
          <text:p text:style-name="P92">C₁ = 25</text:p>
        </text:list-item>
        <text:list-item>
          <text:p text:style-name="P92">C₂ = 85</text:p>
        </text:list-item>
      </text:list>
      <text:p text:style-name="P31">Since the centroids do not change further, the algorithm stops.</text:p>
      <text:p text:style-name="P27"/>
      <text:h text:style-name="P71" text:outline-level="2">(b) Choosing K using the Elbow Method</text:h>
      <text:p text:style-name="P17"><text:span text:style-name="T11">The Elbow Method helps determine the optimal value of </text:span><text:span text:style-name="Strong_20_Emphasis"><text:span text:style-name="T12">K</text:span></text:span><text:span text:style-name="T11">.</text:span></text:p>
      <text:p text:style-name="P49">Steps:</text:p>
      <text:list text:style-name="L58">
        <text:list-item>
          <text:p text:style-name="P93">Run K-Means for different values of K.</text:p>
        </text:list-item>
        <text:list-item>
          <text:p text:style-name="P93">Calculate the Within-Cluster Sum of Squares (WCSS).</text:p>
        </text:list-item>
        <text:list-item>
          <text:p text:style-name="P94"><text:span text:style-name="T11">Plot </text:span><text:span text:style-name="Strong_20_Emphasis"><text:span text:style-name="T12">K</text:span></text:span><text:span text:style-name="T11"> versus </text:span><text:span text:style-name="Strong_20_Emphasis"><text:span text:style-name="T12">WCSS</text:span></text:span><text:span text:style-name="T11">.</text:span></text:p>
        </text:list-item>
        <text:list-item>
          <text:p text:style-name="P93">Choose the point where the graph forms an "elbow."</text:p>
        </text:list-item>
      </text:list>
      <text:section text:style-name="Sect1" text:name="Section32">
        <text:p text:style-name="P18"><text:bookmark text:name="code-block-viewer Copy 31"/><text:span text:style-name="Source_20_Text"><text:span text:style-name="T13">WCSS</text:span></text:span></text:p>
        <text:p text:style-name="P19"><text:soft-page-break/><text:span text:style-name="Source_20_Text"><text:span text:style-name="T15">│</text:span></text:span><text:span text:style-name="Source_20_Text"><text:span text:style-name="T17">\</text:span></text:span></text:p>
        <text:p text:style-name="P19"><text:span text:style-name="Source_20_Text"><text:span text:style-name="T15">│ </text:span></text:span><text:span text:style-name="Source_20_Text"><text:span text:style-name="T17">\</text:span></text:span></text:p>
        <text:p text:style-name="P19"><text:span text:style-name="Source_20_Text"><text:span text:style-name="T15">│ <text:s/></text:span></text:span><text:span text:style-name="Source_20_Text"><text:span text:style-name="T17">\</text:span></text:span></text:p>
        <text:p text:style-name="P19"><text:span text:style-name="Source_20_Text"><text:span text:style-name="T15">│ <text:s text:c="2"/></text:span></text:span><text:span text:style-name="Source_20_Text"><text:span text:style-name="T17">\__</text:span></text:span></text:p>
        <text:p text:style-name="P19"><text:span text:style-name="Source_20_Text"><text:span text:style-name="T15">│ <text:s text:c="5"/></text:span></text:span><text:span text:style-name="Source_20_Text"><text:span text:style-name="T17">\__</text:span></text:span></text:p>
        <text:p text:style-name="P19"><text:span text:style-name="Source_20_Text"><text:span text:style-name="T15">└────────────</text:span></text:span></text:p>
        <text:p text:style-name="P19"><text:span text:style-name="Source_20_Text"><text:span text:style-name="T15"><text:s text:c="3"/></text:span></text:span><text:span text:style-name="Source_20_Text"><text:span text:style-name="T17">1 2 3 4 5</text:span></text:span></text:p>
        <text:p text:style-name="P19"><text:span text:style-name="Source_20_Text"><text:span text:style-name="T15"><text:s text:c="8"/>↑</text:span></text:span></text:p>
        <text:p text:style-name="P19"><text:span text:style-name="Source_20_Text"><text:span text:style-name="T15"><text:s text:c="5"/></text:span></text:span><text:span text:style-name="Source_20_Text"><text:span text:style-name="T17">Optimal K</text:span></text:span></text:p>
      </text:section>
      <text:p text:style-name="P31">The elbow point indicates the best number of clusters.</text:p>
      <text:p text:style-name="P27"/>
      <text:h text:style-name="P71" text:outline-level="2">(c) K-Means vs Hierarchical Clustering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2">K-Means</text:p>
            </table:table-cell>
            <table:table-cell table:style-name="Table9.A1" office:value-type="string">
              <text:p text:style-name="P32">Hierarchical Clustering</text:p>
            </table:table-cell>
          </table:table-row>
        </table:table-header-rows>
        <table:table-row>
          <table:table-cell table:style-name="Table9.A2" office:value-type="string">
            <text:p text:style-name="P33">Requires K before clustering</text:p>
          </table:table-cell>
          <table:table-cell table:style-name="Table9.A2" office:value-type="string">
            <text:p text:style-name="P33">Does not require K initially</text:p>
          </table:table-cell>
        </table:table-row>
        <table:table-row>
          <table:table-cell table:style-name="Table9.A2" office:value-type="string">
            <text:p text:style-name="P33">Faster for large datasets</text:p>
          </table:table-cell>
          <table:table-cell table:style-name="Table9.A2" office:value-type="string">
            <text:p text:style-name="P33">Slower for large datasets</text:p>
          </table:table-cell>
        </table:table-row>
        <table:table-row>
          <table:table-cell table:style-name="Table9.A2" office:value-type="string">
            <text:p text:style-name="P33">Uses centroids</text:p>
          </table:table-cell>
          <table:table-cell table:style-name="Table9.A2" office:value-type="string">
            <text:p text:style-name="P33">Uses dendrogram (tree structure)</text:p>
          </table:table-cell>
        </table:table-row>
        <table:table-row>
          <table:table-cell table:style-name="Table9.A2" office:value-type="string">
            <text:p text:style-name="P33">Suitable for large datasets</text:p>
          </table:table-cell>
          <table:table-cell table:style-name="Table9.A2" office:value-type="string">
            <text:p text:style-name="P33">Suitable for small datasets</text:p>
          </table:table-cell>
        </table:table-row>
        <table:table-row>
          <table:table-cell table:style-name="Table9.A6" office:value-type="string">
            <text:p text:style-name="P33">Produces flat clusters</text:p>
          </table:table-cell>
          <table:table-cell table:style-name="Table9.A6" office:value-type="string">
            <text:p text:style-name="P34">Produces hierarchical clusters</text:p>
          </table:table-cell>
        </table:table-row>
      </table:table>
      <text:h text:style-name="P16" text:outline-level="3">Conclusion</text:h>
      <text:p text:style-name="P95">Clustering is a fundamental unsupervised learning technique. K-Means is efficient for large datasets, while Hierarchical Clustering provides a tree-like representation and is useful for smaller datasets</text:p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2T11:22:25.779009000</meta:creation-date>
    <dc:date>2026-07-12T11:33:03.787589700</dc:date>
    <meta:editing-duration>PT10M38S</meta:editing-duration>
    <meta:editing-cycles>1</meta:editing-cycles>
    <meta:document-statistic meta:table-count="9" meta:image-count="0" meta:object-count="0" meta:page-count="28" meta:paragraph-count="846" meta:word-count="3022" meta:character-count="18814" meta:non-whitespace-character-count="16425"/>
    <meta:generator>LibreOffice/26.2.4.1$Windows_X86_64 LibreOffice_project/1a563c585d9fd784842a5a6101a714090c4fd0fd</meta:generator>
  </office:meta>
</office:document-meta>
</file>